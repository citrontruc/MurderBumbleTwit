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justify" style:justify-single-word="false"/>
      <style:text-properties fo:language="fr" fo:country="FR"/>
    </style:style>
    <style:style style:name="P2" style:family="paragraph" style:parent-style-name="Standard">
      <style:paragraph-properties fo:text-align="justify" style:justify-single-word="false"/>
      <style:text-properties fo:language="fr" fo:country="FR"/>
    </style:style>
    <style:style style:name="P3" style:family="paragraph" style:parent-style-name="Standard" style:list-style-name="L1">
      <style:paragraph-properties fo:text-align="justify" style:justify-single-word="false"/>
      <style:text-properties fo:language="fr" fo:country="FR"/>
    </style:style>
    <style:style style:name="P4" style:family="paragraph" style:parent-style-name="Standard" style:list-style-name="L2">
      <style:paragraph-properties fo:text-align="justify" style:justify-single-word="false"/>
      <style:text-properties fo:language="fr" fo:country="FR"/>
    </style:style>
    <style:style style:name="P5" style:family="paragraph" style:parent-style-name="Heading_20_1">
      <style:text-properties fo:language="fr" fo:country="FR"/>
    </style:style>
    <style:style style:name="P6" style:family="paragraph" style:parent-style-name="Standard" style:list-style-name="L3">
      <style:paragraph-properties fo:text-align="justify" style:justify-single-word="false"/>
      <style:text-properties fo:language="fr" fo:country="FR"/>
    </style:style>
    <style:style style:name="P7" style:family="paragraph" style:parent-style-name="Heading_20_1">
      <style:paragraph-properties fo:break-before="page"/>
      <style:text-properties fo:language="fr" fo:country="FR"/>
    </style:style>
    <style:style style:name="P8" style:family="paragraph" style:parent-style-name="Standard">
      <style:paragraph-properties fo:text-align="justify" style:justify-single-word="false"/>
      <style:text-properties fo:language="fr" fo:country="FR" officeooo:rsid="00436fa6" officeooo:paragraph-rsid="00436fa6"/>
    </style:style>
    <style:style style:name="P9" style:family="paragraph" style:parent-style-name="Standard">
      <style:paragraph-properties fo:text-align="justify" style:justify-single-word="false"/>
      <style:text-properties fo:language="fr" fo:country="FR" fo:font-weight="bold" officeooo:rsid="00436fa6" officeooo:paragraph-rsid="00436fa6" style:font-weight-asian="bold" style:font-weight-complex="bold"/>
    </style:style>
    <style:style style:name="P10" style:family="paragraph" style:parent-style-name="Standard">
      <style:paragraph-properties fo:text-align="justify" style:justify-single-word="false"/>
      <style:text-properties fo:language="fr" fo:country="FR" officeooo:rsid="018a9867" officeooo:paragraph-rsid="018a9867"/>
    </style:style>
    <style:style style:name="P11" style:family="paragraph" style:parent-style-name="Standard">
      <style:paragraph-properties fo:text-align="justify" style:justify-single-word="false"/>
      <style:text-properties fo:language="fr" fo:country="FR" officeooo:rsid="00436fa6" officeooo:paragraph-rsid="019c3d36"/>
    </style:style>
    <style:style style:name="P12" style:family="paragraph" style:parent-style-name="Standard">
      <style:paragraph-properties fo:text-align="justify" style:justify-single-word="false"/>
      <style:text-properties fo:language="fr" fo:country="FR" officeooo:rsid="018a73f6" officeooo:paragraph-rsid="00436fa6"/>
    </style:style>
    <style:style style:name="P13" style:family="paragraph" style:parent-style-name="Standard" style:list-style-name="L4">
      <style:paragraph-properties fo:text-align="justify" style:justify-single-word="false"/>
      <style:text-properties fo:language="fr" fo:country="FR" officeooo:rsid="00436fa6" officeooo:paragraph-rsid="00436fa6"/>
    </style:style>
    <style:style style:name="T1" style:family="text">
      <style:text-properties officeooo:rsid="001e1d0c"/>
    </style:style>
    <style:style style:name="T2" style:family="text">
      <style:text-properties officeooo:rsid="002128cd"/>
    </style:style>
    <style:style style:name="T3" style:family="text">
      <style:text-properties officeooo:rsid="002cf8e7"/>
    </style:style>
    <style:style style:name="T4" style:family="text">
      <style:text-properties officeooo:rsid="002e5cbb"/>
    </style:style>
    <style:style style:name="T5" style:family="text">
      <style:text-properties officeooo:rsid="00377d2f"/>
    </style:style>
    <style:style style:name="T6" style:family="text">
      <style:text-properties officeooo:rsid="00393aca"/>
    </style:style>
    <style:style style:name="T7" style:family="text">
      <style:text-properties officeooo:rsid="01b69fa8"/>
    </style:style>
    <style:style style:name="T8" style:family="text">
      <style:text-properties officeooo:rsid="01b87723"/>
    </style:style>
    <style:style style:name="T9" style:family="text">
      <style:text-properties fo:font-weight="bold" style:font-weight-asian="bold" style:font-weight-complex="bold"/>
    </style:style>
    <style:style style:name="T10" style:family="text">
      <style:text-properties officeooo:rsid="01bc8b91"/>
    </style:style>
    <style:style style:name="T11" style:family="text">
      <style:text-properties officeooo:rsid="01bf68b7"/>
    </style:style>
    <style:style style:name="T12" style:family="text">
      <style:text-properties officeooo:rsid="01bf82f9"/>
    </style:style>
    <style:style style:name="T13" style:family="text">
      <style:text-properties officeooo:rsid="01c09bab"/>
    </style:style>
    <style:style style:name="T14" style:family="text">
      <style:text-properties officeooo:rsid="01c64042"/>
    </style:style>
    <style:style style:name="T15" style:family="text">
      <style:text-properties officeooo:rsid="01c5663f"/>
    </style:style>
    <style:style style:name="T16" style:family="text">
      <style:text-properties officeooo:rsid="01c593cd"/>
    </style:style>
    <style:style style:name="T17" style:family="text">
      <style:text-properties officeooo:rsid="01c810ce"/>
    </style:style>
    <style:style style:name="T18" style:family="text">
      <style:text-properties officeooo:rsid="01cb60e3"/>
    </style:style>
    <style:style style:name="T19" style:family="text">
      <style:text-properties officeooo:rsid="01cc39c4"/>
    </style:style>
    <style:style style:name="T20" style:family="text">
      <style:text-properties officeooo:rsid="01cde43e"/>
    </style:style>
    <style:style style:name="T21" style:family="text">
      <style:text-properties officeooo:rsid="01d1456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L’</text:span>Invitation</text:h>
      <text:p text:style-name="P2"/>
      <text:p text:style-name="P2">Cher ami,</text:p>
      <text:p text:style-name="P2"/>
      <text:p text:style-name="P2"><text:tab/>Par la présente, vous êtes convié par Lord BumbleTwit à une séance de spiritisme dans sa résidence d’été.</text:p>
      <text:p text:style-name="P2"><text:tab/>Dans la cité où le labyrinthe guide les pénitents, les vitraux laissent des traces sanglantes sur la pierre et certaines dettes semblent survivre à la mort elle-même.</text:p>
      <text:p text:style-name="P2"><text:tab/>Lorsque l’odeur de la poudre à canon se sera enfin dissipée des rues et que les derniers échos de la Marseillaise auront cessé de troubler la nuit, nous tenterons d’entrer en communion avec l’âme de notre regretté ami Lord Bertham, assassiné il y a maintenant cinq ans.</text:p>
      <text:p text:style-name="P2"/>
      <text:p text:style-name="P2">Âmes sensibles, vous ne l’emporterez pas au paradis.</text:p>
      <text:p text:style-name="P2">Très cordialement,</text:p>
      <text:p text:style-name="P2"/>
      <text:p text:style-name="P2">Lord BumbleTwit</text:p>
      <text:p text:style-name="P2"/>
      <text:h text:style-name="P1" text:outline-level="1">La murder party</text:h>
      <text:p text:style-name="P2"/>
      <text:p text:style-name="P2"><text:tab/>Lord BumbleTwit a toujours été un curieux personnage. Révéré comme haï, ce gentleman ne laisse pas indifférent. Medium reconnu, il est parvenu à construire sa fortune grâce à ses fameuses "séances" avec lesquels il dialogue avec les défunts. Ces événements à huis-clos lui ont toujours permis d'attirer un publique hétéroclite constitué de jeunes gens avides de frissons, de vieillards en deuil et d'artistes curieux. Et bien entendu de généreux mécènes.</text:p>
      <text:p text:style-name="P2"/>
      <text:p text:style-name="P2"><text:tab/>Parmi les mécènes de Lord BumbleTwit, se trouvait Lord Bertham. Financier veuf, misanthrope et acariatre, Lord Bertham a fait don de sommes colossales à Lord BumbleTwit pendant les trois mois où celui-ci est demeuré chez lui. Pendant cette période, le médium utilisait ses talents afin de dialoguer avec l'esprit de Lady Bertham et de l'opinion de tous, cela avait permis à Lord Bertham de trouver une forme de paix. Malheureusement, celle-ci fut de courte durée car Lord Bertham finit assassiné dans bureau dans des circonstances suspectes. <text:span text:style-name="T2">L’affaire n’a jamais été élucidée.</text:span></text:p>
      <text:p text:style-name="P2"/>
      <text:p text:style-name="P2"><text:tab/>Nous nous trouvons cinq ans plus tard. Lord BumbleTwit a depuis racheté le manoir de Bertham. Vous pensiez que l'affaire de la mort de Lord Bertham était derrière vous quand Lord BumbleTwit vous a invité à une séance très particulière pendant laquelle l'esprit de Lord Bertham sera invoqué afin de l'interroger sur les circonstances de sa mort. Lors de cette soirée n'ont été invités que des gens triés sur le volet :</text:p>
      <text:p text:style-name="P2"/>
      <text:list text:style-name="L1">
        <text:list-item>
          <text:p text:style-name="P3">Amanda Red : Experte comptable de Lord Bertham et sceptique notoire.</text:p>
        </text:list-item>
        <text:list-item>
          <text:p text:style-name="P3">Le Dr Derelict : Médecin qui accompagnait Lord Bertham et inventeur à ses heures perdues.</text:p>
        </text:list-item>
        <text:list-item>
          <text:p text:style-name="P3">John Bertham : Fils cadet de Lord Bertham, viveur et amateur de théâtre.</text:p>
        </text:list-item>
        <text:list-item>
          <text:p text:style-name="P3">Gabriel Bertham : Fils ainé de Lord Bertham et médecin.</text:p>
        </text:list-item>
        <text:list-item>
          <text:p text:style-name="P3">Patience Bertham : Fille de Lord Bertham qui termine ses études de juriste.</text:p>
        </text:list-item>
        <text:list-item>
          <text:p text:style-name="P3">Tybalt LeFol : Grand ami de Lord Bertham et adepte des arts obscurs.</text:p>
        </text:list-item>
        <text:list-item>
          <text:p text:style-name="P3"><text:soft-page-break/>Luca Mason : livreur Amazon qui passait par là et a fini avec une coupe de champagne à la main.</text:p>
        </text:list-item>
      </text:list>
      <text:p text:style-name="P2"/>
      <text:p text:style-name="P2">Et les membres du personnel :</text:p>
      <text:p text:style-name="P2"/>
      <text:list text:style-name="L2">
        <text:list-item>
          <text:p text:style-name="P4">Archie Butler : Chef du personnel dirigeant la maison d'une main de fer.</text:p>
        </text:list-item>
        <text:list-item>
          <text:p text:style-name="P4">Bobby Watson : Homme à tout faire de la maison.</text:p>
        </text:list-item>
      </text:list>
      <text:h text:style-name="P5" text:outline-level="1">Wow ! et moi dans tout ça ?</text:h>
      <text:p text:style-name="P2"/>
      <text:p text:style-name="P2"><text:tab/>Dans cette murder party, vous allez incarner l'un des personnages présent<text:span text:style-name="T3">s</text:span> à la soirée. Dans votre fiche de personnage seront présentés succintement les informations suivantes :</text:p>
      <text:p text:style-name="P2"/>
      <text:list text:style-name="L3">
        <text:list-item>
          <text:p text:style-name="P6">Qui vous êtes.</text:p>
        </text:list-item>
        <text:list-item>
          <text:p text:style-name="P6">Si vous avez tué quelqu'un.</text:p>
        </text:list-item>
        <text:list-item>
          <text:p text:style-name="P6">Quel a été votre emploi du temps lors de <text:span text:style-name="T4">la</text:span> soirée et cinq ans plus tôt lors de la mort de Lord Bertham.</text:p>
        </text:list-item>
        <text:list-item>
          <text:p text:style-name="P6">Vos objectifs et les informations que vous voulez dissimuler.</text:p>
        </text:list-item>
      </text:list>
      <text:p text:style-name="P2"/>
      <text:p text:style-name="P2"><text:tab/>En discutant avec les autres joueurs et avec les organisateurs de la murder party, vous allez pouvoir découvrir ce qui s'est passé lors de la soirée et ainsi résoudre le mystère de la mort de Lord BumbleTwit mais faites attention : il y a un meurtrier parmi vous !</text:p>
      <text:p text:style-name="P2"/>
      <text:p text:style-name="P2"><text:tab/>Les informations que vous avez sur votre fiche de personnage sont censées donner quelques des éléments sur le personnage que vous allez incarner mais elles n'indiquent pas vraiment qui vous êtes. N'hésitez pas à rajouter de la richesse à votre personnage <text:span text:style-name="T5">en inventant une vie à votre personnage en dehors des tristes événements qui vous rassemblent </text:span><text:span text:style-name="T6">ce soir. </text:span>Si une information n'est pas spécifiée dans votre fiche de personnage, vous pouvez à priori la remplir.</text:p>
      <text:p text:style-name="P2"/>
      <text:h text:style-name="P5" text:outline-level="1">Règles de sécurité</text:h>
      <text:p text:style-name="P2"/>
      <text:p text:style-name="P2"><text:tab/>Certains des personnages présentés par les fiches de personnages possèdent des intentions douteuses voire criminelles à la manière d'un roman policier. Autant que possible, faites attention aux autres joueurs en incarnant vos personnages. Ce n'est pas parce qu'un propos est dit par un personnage fictif qu'il ne fait pas de mal.</text:p>
      <text:p text:style-name="P2"/>
      <text:p text:style-name="P2">Le jour J, les organisateurs présenteront des règles de sécurité qu'il faudra suivre.</text:p>
      <text:h text:style-name="P7" text:outline-level="1">Votre personnage : <text:span text:style-name="T7">Bobby Watson</text:span></text:h>
      <text:p text:style-name="P8"/>
      <text:p text:style-name="P9">Avez-vous tué quelqu'un ?</text:p>
      <text:p text:style-name="P8"/>
      <text:p text:style-name="P10"><text:span text:style-name="T8">Non</text:span>.</text:p>
      <text:p text:style-name="P8"/>
      <text:p text:style-name="P9">Qui êtes-vous ?</text:p>
      <text:p text:style-name="P8"/>
      <text:p text:style-name="P8"><text:tab/>Vous êtes Bobby Watson, fils de Bobby Watson et de sa charmante épouse Bobby Watson. Vous vous occupez de la demeure Bertham depuis sa création il y a de cela des années. Vous êtes le jardinier, acupuncteur, barman, maitre nageur, apiculteur... de la demeure Bertham et vous savez jouer du TamTam comme personne.</text:p>
      <text:h text:style-name="P5" text:outline-level="1">Votre emploi du temps</text:h>
      <text:p text:style-name="P8">**<text:span text:style-name="T9">IMPORTANT</text:span>** : Vous fumez.</text:p>
      <text:p text:style-name="P8"/>
      <text:p text:style-name="P9">### Il y a 5 ans - Lord Bertham</text:p>
      <text:p text:style-name="P8"/>
      <text:p text:style-name="P8"><text:tab/>Le malheur ne pouvait que se produire dans cette maison du diable. Vous sentiez dans vos os qu'un basculement astral s'était fait depuis que la lune était rentré dans son septième croissant epistolique et il fallait donc se protéger.</text:p>
      <text:p text:style-name="P8"/>
      <text:p text:style-name="P8"><text:tab/>Le jour de la mort de Lord Bertham, vous étiez naturellement en train d'entourer les portes et les fenêtres de sel afin de pouvoir garder le mauvais esprit au loin quand la tragédie est arrivée. Hélas ! Vous saviez que la maison possédait des passages secrets et le malin a dû utiliser l'un d'eux car la mort a frappé la demeure ! Entendant les cris de détresse de Gabriel Bertham, vous êtes accouru devant le cadavre de Lord Bertham. Là, Gabriel Bertham vous dit d'aller chercher son frère que vous avez trouvé dans le jardin à discuter avec Lord BumbleTwit. Ils ne savaient pas le malheur qui avait frappé le foyer.</text:p>
      <text:p text:style-name="P8"/>
      <text:p text:style-name="P8"><text:tab/>Vous êtes revenu pendant une nuit de pleine lune dans le bureau de Lord Bertham où a eu lieu le meurtre. Agenouillé sur le sol à l'endroit où le crime avait eu lieu, vous avez reniflé une odeur malsaine qui s'échappait et se dirigeait dehors, aux limites de la demeure. Eclairé seulement par la lune et guidé par les étoiles, fouetté par le vent nocturne et pistant la pestilante fragance du mal, vous avez atteint le lac au fond du domaine. Là se trouvait une horloge de bureau brisée. Sa détresse pouvait se sentir et une aura de vilainie l'enveloppait. Vous l'avez recueilli et nettoyé pour la remettre dans le bureau de Lord Bertham où elle vous a alors souri. L'ordre de la pièce était rétabli.</text:p>
      <text:p text:style-name="P8"/>
      <text:p text:style-name="P8"><text:tab/>Quand Lord BumbleTwit a racheté la maison, il vous a naturellement racheté avec. Personne d'autre ne touche à vos petunias.</text:p>
      <text:p text:style-name="P8"/>
      <text:p text:style-name="P9">### Lord BumbleTwit</text:p>
      <text:p text:style-name="P8"/>
      <text:p text:style-name="P11"><text:tab/>De nouveau, le malheur semblait poindre vers la ligne de l'horizon astral. Le sel n'ayant pas fonctionné la dernière fois, vous avez eu l'idée de tremper tous les objets tranchants de la maison dans de l'eau bénite afin de pouvoir neutraliser leur pouvoir dévastateur. Vous vous êtes ensuite attelé à vos tâches domestiques : couper les fleurs, laver les fenêtres, acheter les produits de beauté de Lord <text:soft-page-break/>BumbleTwit, allumer un cierge et en plus, cette fois-ci, vous vous voyiez donné une responsabilité nouvelle : préparer le repas. <text:span text:style-name="T10">Le chef avait été pris d’u</text:span>n mal sans nul doute d'origine satanique <text:span text:style-name="T11">qui faisait qu’il ne pouvait pas venir.</text:span> Fort heureusement, le plat préparé était du poisson : un animal aimé de dieu et dont la consommation le réjouit. Afin de pouvoir maximiser les bienfaits de ce repas, vous avez suivi avec dévotion et abnégations les consignes de préparation laissées par le chef Gembre.</text:p>
      <text:p text:style-name="P11"/>
      <text:p text:style-name="P11"><text:tab/>Vers 18h40, Archie est venu vous déranger <text:span text:style-name="T12">dans la cuisine</text:span>. Lord BumbleTwit vous avait fait demandé pour une affaire de la plus haute importance. <text:span text:style-name="T13">Dans son bureau, il</text:span> demand<text:span text:style-name="T13">a</text:span> si vous aviez ressenti un quelconque manque dans les objets du mobiliers après la mort de Lord Bertham et votre langue a proclamée la réalité pleine et entière. Vous interrogeant sur les invités présents lors de la soirée, vous l'avez prévenu qu'un accord semblait rapprocher John et Amanda. Quelque transaction s'était faite entre les deux dont pouvait provenir autant de bénéfices que de déceptions.</text:p>
      <text:p text:style-name="P11"/>
      <text:p text:style-name="P11"><text:tab/>En retournant à la cuisine, vous avez cru voir dans le grand miroir le visage de l'impur se gausser de vous et un sombre pressentiment s'est saisi de votre coeur : le poisson brulait ! Un incendie aurait pu raser la maison si ce n'est l'intervention de Luca Mason qui avait éteint le four. Luca Mason : vous avez vu en lui une âme double enchainée à des vérités troublantes et perverses. Quelle voix d'ange ou de prophète l'avait donc guidé vers la cuisine ? Sans doute son rôle est plus vaste que vous ne pouvez encore le concevoir et plusieurs chemins se retrouveront pour former une clairière.</text:p>
      <text:p text:style-name="P11"/>
      <text:p text:style-name="P11"><text:tab/>Afin de <text:span text:style-name="T14">sauver</text:span> le repas, vous avec décongelé des batonnets de colin (le trésor du capitaine) pour rassasier les convives. <text:span text:style-name="T15">Si un malaise semblait émaner de la cuisine, vous n’avez pas eu le temps d’</text:span><text:span text:style-name="T16">en découvrir son origine : trop occupé que vous étiez à </text:span><text:span text:style-name="T17">accomplir votre destin de nouveau chef cuisinier</text:span><text:span text:style-name="T16">.</text:span> Le repas fut sans événement particulier si ce n'est le départ d'Amanda de table. Elle laissa derrière elle une trainée nefaste d'émotions violentes qui ne vous a pas rassuré.</text:p>
      <text:p text:style-name="P11"/>
      <text:p text:style-name="P11"><text:tab/>Vous avez assisté à la séance de spiritisme de Lord BumbleTwit. C'était très rigolo. Le reste de la soirée a été consacrée à faire leur thème astral aux autres convives et à leur préparer du thé.</text:p>
      <text:p text:style-name="P11"/>
      <text:p text:style-name="P11"><text:tab/>Vers minuit, vous avez poussé un soupir de soulagement. Malgré les hospices funestes, il semblait que la journée se soit terminé sans que Lucifer ait frappé. A peine ce sentiment vous a envahi que vous avez entendu un rire démoniaque s'élever des entrailles de la terre et se moquer de votre confiance mal placée. Lachant le plateau de thé que vous portiez, vous vous êtes rué à l'étage pour trouver la porte du bureau de Lord BumbleTwit fermée à clé. Brandissant votre crucifix dans la main droite, vous avez défoncé la porte d'un coup de pieds magistral vous offrant un sinistre spectacle : Lord BumbleTwit était mort, un coupe-papier dans le coeur. Le rire de Lucifer est alors revenu à vos oreilles, se raillant de vos espoirs trahis ! L'eau bénite n'avait donc pas été assez pour le protéger ! Vous alliez regagner le salon quand vous avez repéré une aura maléfique et puissante s'échappant de la poche du pantalon de Lord BumbleTwit. Une noirceure pregante qui dissimulait des secrets délétères et oubliés. Vous êtes descendu dans le salon pour chercher de l'aide.</text:p>
      <text:p text:style-name="P11"/>
      <text:p text:style-name="P11"><text:tab/>De retour dans la chambre, vous trembliez de tout votre corps. <text:span text:style-name="T18">L</text:span>e meurtre suinta<text:span text:style-name="T19">i</text:span>t depuis les murs de la pièce. Pour vous remettre de vos émotions, le Docteur Derelict vous a tendu un verre de gin à l'odeur douce <text:span text:style-name="T20">que vous avez avalé en pensant au salut de l’âme et à la rémission des péchés.</text:span></text:p>
      <text:p text:style-name="P11"/>
      <text:p text:style-name="P11"><text:tab/>Vous êtes revenu dans l<text:span text:style-name="T21">e bureau de Lord BumbleTwit</text:span> au matin pour sentir que le mobilier était en détresse. Quelque chose qui appartenait à la pièce manquait et quelque chose qui n'aurait pas dû y être se cachait. Très étrange.</text:p>
      <text:p text:style-name="P8"/>
      <text:h text:style-name="Heading_20_1" text:outline-level="1"><text:soft-page-break/>Informations que vous voulez garder secrètes</text:h>
      <text:p text:style-name="P8"/>
      <text:p text:style-name="P8"><text:tab/>Il y a plusieurs informations que vous préféreriez dissimuler. Vous ne pouvez pas révéler ces informations de vous-mêmes. Si un autre joueur vous pose des questions sur ces sujets, évitez les questions, échappez vous ou indignez-vous. Si un autre joueur vous présente l'information (il a découvert le peau aux roses), vous pouvez reconnaitre les faits mais que à ce joueur.</text:p>
      <text:p text:style-name="P8"/>
      <text:p text:style-name="P8">- Les flammes de l'enfer ayant emporté les poissons que le chef a apporté, vous avez à la place mis des poissons panés.</text:p>
      <text:p text:style-name="P8"/>
      <text:h text:style-name="Heading_20_1" text:outline-level="1">Objectifs</text:h>
      <text:p text:style-name="P8"/>
      <text:p text:style-name="P8">- Faites une prédiction astrale à trois personnes dans la soirée.</text:p>
      <text:p text:style-name="P8">- Trouvez comment ramener la paix au mobilier du bureau <text:span text:style-name="T15">et à celui de la cuisine</text:span>.</text:p>
      <text:p text:style-name="P8">- Décryptez la noirceur dans le coeur des félons.</text:p>
      <text:p text:style-name="P8"/>
      <text:h text:style-name="Heading_20_1" text:outline-level="1">Conseils de jeux</text:h>
      <text:p text:style-name="P12"/>
      <text:list text:style-name="L4">
        <text:list-item>
          <text:p text:style-name="P13">Amusez-vous bie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7-12T23:42:34.162208440</meta:creation-date>
    <dc:date>2026-07-14T19:49:14.272330323</dc:date>
    <meta:editing-duration>PT1H32M6S</meta:editing-duration>
    <meta:editing-cycles>357</meta:editing-cycles>
    <meta:generator>LibreOffice/26.2.4.2$Linux_X86_64 LibreOffice_project/620$Build-2</meta:generator>
    <meta:document-statistic meta:table-count="0" meta:image-count="0" meta:object-count="0" meta:page-count="5" meta:paragraph-count="63" meta:word-count="2006" meta:character-count="11650" meta:non-whitespace-character-count="9697"/>
  </office:meta>
</office:document-meta>
</file>