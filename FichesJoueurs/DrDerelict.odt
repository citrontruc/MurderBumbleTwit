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0436fa6" officeooo:paragraph-rsid="0067ae76"/>
    </style:style>
    <style:style style:name="P11" style:family="paragraph" style:parent-style-name="Standard" style:list-style-name="L4">
      <style:paragraph-properties fo:text-align="justify" style:justify-single-word="false"/>
      <style:text-properties fo:language="fr" fo:country="FR" officeooo:rsid="00436fa6" officeooo:paragraph-rsid="00436fa6"/>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0c832fd"/>
    </style:style>
    <style:style style:name="T8" style:family="text">
      <style:text-properties fo:font-weight="bold" style:font-weight-asian="bold" style:font-weight-complex="bold"/>
    </style:style>
    <style:style style:name="T9" style:family="text">
      <style:text-properties officeooo:rsid="00b42d95"/>
    </style:style>
    <style:style style:name="T10" style:family="text">
      <style:text-properties officeooo:rsid="00b7831c"/>
    </style:style>
    <style:style style:name="T11" style:family="text">
      <style:text-properties officeooo:rsid="00b808ff"/>
    </style:style>
    <style:style style:name="T12" style:family="text">
      <style:text-properties officeooo:rsid="00b8fee7"/>
    </style:style>
    <style:style style:name="T13" style:family="text">
      <style:text-properties officeooo:rsid="00bb1287"/>
    </style:style>
    <style:style style:name="T14" style:family="text">
      <style:text-properties officeooo:rsid="00bb5d50"/>
    </style:style>
    <style:style style:name="T15" style:family="text">
      <style:text-properties officeooo:rsid="00bced18"/>
    </style:style>
    <style:style style:name="T16" style:family="text">
      <style:text-properties officeooo:rsid="00c3448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Le Docteur Derelict</text:span></text:h>
      <text:p text:style-name="P8"/>
      <text:p text:style-name="P9">Avez-vous tué quelqu'un ?</text:p>
      <text:p text:style-name="P8"/>
      <text:p text:style-name="P8">C'est vous qui avez tué Lord BumbleTwit (peut-être, en fait vous n'en êtes pas sûr).</text:p>
      <text:p text:style-name="P8"/>
      <text:p text:style-name="P9">Qui êtes-vous ?</text:p>
      <text:p text:style-name="P8"/>
      <text:p text:style-name="P8"><text:tab/>Médecin alcoolique et coureur, vous parvenez difficilement à survivre en tant que praticien. Votre haleine avinée repousse les clients les plus amateurs de risque et vos gains servent à acheter des cadeaux à vos maitresses. Votre source de revenu la plus stable est Lord BumbleTwit qui vous commande souvent des inventions ingénieuses : Machines à fumée, papier flash... Vous êtes l'expert dans le domaine. Lord BumbleTwit sert aussi d'intermédiaire pour vendre vos inventions à des théâtres, cirques et autres.</text:p>
      <text:h text:style-name="P5" text:outline-level="1">Votre emploi du temps</text:h>
      <text:p text:style-name="P8">**<text:span text:style-name="T8">IMPORTANT</text:span>** : Vous fumez.</text:p>
      <text:p text:style-name="P8"/>
      <text:p text:style-name="P9">### Il y a 5 ans - Lord Bertham</text:p>
      <text:p text:style-name="P8"/>
      <text:p text:style-name="P8"><text:tab/>C'est vous qui avez introduit Lord BumbleTwit à Lord Bertham. Ne parvenant pas à trouver parmi vos fioles un moyen de guérir son coeur brisé, vous avez décidé de proposer des solutions plus... ésotériques. Vous aviez déjà vendu à Lord BumbleTwit plusieurs de vos inventions ingénieuses et vous saviez qu'il les utilisait pour ajouter un peu de spectacle à ses séances <text:span text:style-name="T9">dans lesquels il rappelait les esprits des morts</text:span>. Bien que réticent au début, Lord Bertham fut convaincu par les talents de Lord BumbleTwit, vous gagnant un peu de son prestige au passage.</text:p>
      <text:p text:style-name="P8"/>
      <text:p text:style-name="P8"><text:tab/>La matinée de la mort de Lord Bertham, vous étiez en train d'étudier la dynamique des fluides dans le cellier du manoir quand vous avez entendu des bruits de pas non loin de là où vous vous trouviez. Avisant la porte vous avez alors vu passer Carl BlueFinch, l<text:span text:style-name="T10">e</text:span> domestique des Bertham. Il transportait une horloge de bureau et son regard <text:span text:style-name="T11">était </text:span>hagard. Comme vous étiez camouflé dans votre environnement naturel, il ne vous a pas remarqué. Vous l'avez suivi dans le jardin où vous l'avez vu aller jusqu'à l'étang au fond <text:span text:style-name="T12">de la propriété </text:span>pour jeter ce qu'il transportait. Le fait ne vous semblait guère intéressant jusqu'à ce que vous retourniez au manoir pour y entendre des cris venant de l'étage. On venait de tuer Lord Bertham ! <text:span text:style-name="T13">Seul Archie savait que vous étiez sur place et pour un billet, il a rapidement oublié le fait. </text:span><text:span text:style-name="T14">Vous n’avez donc guère été interrogé par la police.</text:span></text:p>
      <text:p text:style-name="P8"/>
      <text:p text:style-name="P9">### Quelques jours avant la réception</text:p>
      <text:p text:style-name="P8"/>
      <text:p text:style-name="P8"><text:tab/>Etant donné votre goût pour les bons vins, votre clientèle a diminué au cours des années et vous avez fini par dépendre de plus en plus de l'argent de Lord BumbleTwit. Il vous achetait pour des sommes dérisoires des inventions que vous mettiez des mois à élaborer ! Le médium ayant un vaste réseau, il avait même fait l'intermédiaire pour la vente de plusieurs de vos machines à des théâtre (machines à fumée, lumière radio commandées, bougies à feu d'artifices)... Qu'est-ce qui vous empêcherait de garder vos inventions pour esssayer vous même de devenir medium ? Lord BumbleTwit vous a rapidement fait comprendre qu'il était dangereux d'essayer de lui faire de l'ombre.</text:p>
      <text:p text:style-name="P8"><text:soft-page-break/></text:p>
      <text:p text:style-name="P9">### Lord BumbleTwit</text:p>
      <text:p text:style-name="P8"/>
      <text:p text:style-name="P10"><text:tab/>Vous êtes arrivé à la soirée bien décidé à tuer Lord BumbleTwit. Afin de faire cela, vous avez eu une idée de génie : le swazzle. Il s'agit d'une petite flute que les maitres marionnettises utilisent pour modifier leur voix afin de pouvoir jouer plusieurs personnages. Vous avez suggéré à Lord BumbleTwit d'en acheter un pouvoir faire semblant que les morts parlent par sa bouche et il a accepté la proposition avec enthousiasme ! Le swazzle est censé être livré par un coursier Amazon dans la soirée. Dans votre trousse médicale, vous avez emporté un flacon d'arsenic. Votre plan est simple : enduire le swazzle d'arsenic pour que le médium avale le poison pendant la séance. Vous pourrez ensuite récupérer l'arme du crime sur lui en faisant semblant de l'ausculter et comme personne ne connait l'existence du swazzle, personne ne pourra remonter à vous.</text:p>
      <text:p text:style-name="P10"/>
      <text:p text:style-name="P10"><text:tab/>Vous vous êtes présenté tôt (vers 17h30) chez Lord BumbleTwit afin de pouvoir récupérer un peu de courage liquide <text:span text:style-name="T15">dans le cellier</text:span>. Archie connait vos visites et pour quelques billets accepte de ne pas ébruiter que certaines bouteilles manquent à l'appel. Le cellier se trouvant à côté de la chambre froide, cela vous a donné l'occasion de jeter un coup d'oeil à ce qui allait être servi au diner : du poisson de fugu. Dangereux comme bestiole ! Sa peau sécrète un poison très violent, la tetrodoxine. Par contre, sa chair est un vrai délice.</text:p>
      <text:p text:style-name="P10"/>
      <text:p text:style-name="P10"><text:tab/>Vers 19h15, comme le repas approchait vous avez décidé de prendre l'arsenic dans votre sacoche pour passer à l'acte pendant le déjeuner. Vous aviez laissé le poison à l'intérieur de votre malette, dans le vestibule. Cependant, en la fouillant vous vous êtes rendu compte que l'arsenic ne se trouvait nulle part. Le flacon avait disparu ! Vous avez paniqué. Comment mener à bien votre plan si vous n'aviez plus le poison sur vous ? La perspective d'attendre la prochaine séance de spiritisme à laquelle Lord BumbleTwit daignera vous inviter vous a épuisé d'avance. Ce sera des mois avant qu'une occasion aussi intéressante se produise ! C'est alors que vous avez repensé au poisson fugu qui se trouvait dans la chambre froide. Fort heureusement il n'y avait personne dans la cuisine. Avisant une paire de gant pleine de chair de poisson qui se trouvait sur le comptoir vous l'avez subtilisé. Déjà 19h30 ? Vous avez couru pour vous rendre à l'étage et vous dissimuler de telle sorte à voir sortir Bobby Watson avec Lord BumbleTwit. Vous êtes alors rentré discrètement pour voir le swazzle sur le bureau de Lord BumbleTwit. Revêtant les gants de cuisine plein de tetrodoxine, vous avez serré bien fort la petite flute afin de l'enduire du poison. Vous avez oté les gants et vous vous êtes sauvé pour gagner la salle à manger.</text:p>
      <text:p text:style-name="P10"/>
      <text:p text:style-name="P10"><text:tab/>Le repas fut fort décevant. Au lieu du délicieux goût du poisson fugu, on vous servit des poissons panés ? Qu'est-ce qui avait bien pu se passer ? Décidément, rien ne se passait comme prévu dans cette soirée !</text:p>
      <text:p text:style-name="P10"/>
      <text:p text:style-name="P10"><text:tab/>La séance de spiritisme fut par contre grandiose ! Vous étiez tous réuni autour d'une table qui se mit à trembler et à produire de la fumée. Tout cela grâce à des inventions que vous aviez construit pour Lord BumbleTwit. Il y eut des bruits de chaines et les lumières dans toutes la pièce se mirent à osciller. Quelqu'un cria quelque chose dans votre dos mais vous ne vouliez pas vous laisser distraire, vous vouliez voir Lord BumbleTwit mettre le swazzle dans sa bouche puis parler "C'est mon fils qui m'a tué !" Dans la demi obscurité de la pièce, vous avez eu un sourire ironique. Pour dire cette phrase, cette unique phrase, Lord BumbleTwit venait de se tuer. Le médium a alors simulé une violente quinte de toux pour recracher le swazzle et le dissimuler dans son mouchoir. Et voila. il ne restait plus qu'à attendre.</text:p>
      <text:p text:style-name="P10"/>
      <text:p text:style-name="P10"><text:soft-page-break/><text:tab/>John n'a pas manqué de faire un éclat et Gabriel a tenté à grand-peine de le contrôler. Deux heures plus tard, Bobby Watson débarquait dans le salon en criant qu'on avait poignardé Lord BumbleTwit. Vous l'avez suivi jusqu'à l'étage où comme prévu, vous avez subtilisé le swazzle pour le glisser dans votre propre poche. Mort le BumbleTwit. Quel soulagement. Avisant Bobby Watson qui se tenait tétanisé de peur à l'entrée de la pièce, vous lui avez tendu le verre de gin qui se trouvait sur la table basse.</text:p>
      <text:p text:style-name="P10">- Pour vos nerfs vieux.</text:p>
      <text:p text:style-name="P10">Et à <text:span text:style-name="T16">la santé de Lord BumbleTwit.</text:span></text:p>
      <text:p text:style-name="P8"/>
      <text:h text:style-name="Heading_20_1" text:outline-level="1">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 Vous avez tué Lord BumbleTwit.</text:p>
      <text:p text:style-name="P8">- Vous voulez éviter de révéler les secrets de comment Lord BumbleTwit effectue ses "miracles" car vous espérez bien vous en resservir plus tard.</text:p>
      <text:p text:style-name="P8"/>
      <text:h text:style-name="Heading_20_1" text:outline-level="1">Objectifs</text:h>
      <text:p text:style-name="P8"/>
      <text:p text:style-name="P8">- Trouvez qui a volé l'arsenic dans votre malette médicale.</text:p>
      <text:p text:style-name="P8">- Faites en sorte que personne ne vous soupçonne du meurtre de Lord BumbleTwit.</text:p>
      <text:p text:style-name="P8">- Trouvez une manière de lancer votre premier spectacle en tant que médium.</text:p>
      <text:p text:style-name="P8"/>
      <text:h text:style-name="Heading_20_1" text:outline-level="1">Conseils de jeux</text:h>
      <text:p text:style-name="P8"/>
      <text:list text:style-name="L4">
        <text:list-item>
          <text:p text:style-name="P11">Préparez quelques mensonges à l'avance pour votre soirée.</text:p>
        </text:list-item>
        <text:list-item>
          <text:p text:style-name="P11">Ne rien faire du tout est suspect, n'hésitez pas à participer aux différentes enquêtes ou à inventer des détails.</text:p>
        </text:list-item>
        <text:list-item>
          <text:p text:style-name="P11">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0:27:51.130305161</dc:date>
    <meta:editing-duration>PT40M27S</meta:editing-duration>
    <meta:editing-cycles>147</meta:editing-cycles>
    <meta:generator>LibreOffice/26.2.4.2$Linux_X86_64 LibreOffice_project/620$Build-2</meta:generator>
    <meta:document-statistic meta:table-count="0" meta:image-count="0" meta:object-count="0" meta:page-count="5" meta:paragraph-count="66" meta:word-count="2159" meta:character-count="12624" meta:non-whitespace-character-count="10526"/>
  </office:meta>
</office:document-meta>
</file>