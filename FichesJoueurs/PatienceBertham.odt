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text-align="justify" style:justify-single-word="false"/>
      <style:text-properties fo:language="fr" fo:country="FR"/>
    </style:style>
    <style:style style:name="P2" style:family="paragraph" style:parent-style-name="Standard">
      <style:paragraph-properties fo:text-align="justify" style:justify-single-word="false"/>
      <style:text-properties fo:language="fr" fo:country="FR"/>
    </style:style>
    <style:style style:name="P3" style:family="paragraph" style:parent-style-name="Standard" style:list-style-name="L1">
      <style:paragraph-properties fo:text-align="justify" style:justify-single-word="false"/>
      <style:text-properties fo:language="fr" fo:country="FR"/>
    </style:style>
    <style:style style:name="P4" style:family="paragraph" style:parent-style-name="Standard" style:list-style-name="L2">
      <style:paragraph-properties fo:text-align="justify" style:justify-single-word="false"/>
      <style:text-properties fo:language="fr" fo:country="FR"/>
    </style:style>
    <style:style style:name="P5" style:family="paragraph" style:parent-style-name="Heading_20_1">
      <style:text-properties fo:language="fr" fo:country="FR"/>
    </style:style>
    <style:style style:name="P6" style:family="paragraph" style:parent-style-name="Standard" style:list-style-name="L3">
      <style:paragraph-properties fo:text-align="justify" style:justify-single-word="false"/>
      <style:text-properties fo:language="fr" fo:country="FR"/>
    </style:style>
    <style:style style:name="P7" style:family="paragraph" style:parent-style-name="Heading_20_1">
      <style:paragraph-properties fo:break-before="page"/>
      <style:text-properties fo:language="fr" fo:country="FR"/>
    </style:style>
    <style:style style:name="P8" style:family="paragraph" style:parent-style-name="Standard">
      <style:paragraph-properties fo:text-align="justify" style:justify-single-word="false"/>
      <style:text-properties fo:language="fr" fo:country="FR" officeooo:rsid="00436fa6" officeooo:paragraph-rsid="00436fa6"/>
    </style:style>
    <style:style style:name="P9" style:family="paragraph" style:parent-style-name="Standard">
      <style:paragraph-properties fo:text-align="justify" style:justify-single-word="false"/>
      <style:text-properties fo:language="fr" fo:country="FR" fo:font-weight="bold" officeooo:rsid="00436fa6" officeooo:paragraph-rsid="00436fa6" style:font-weight-asian="bold" style:font-weight-complex="bold"/>
    </style:style>
    <style:style style:name="P10" style:family="paragraph" style:parent-style-name="Standard">
      <style:paragraph-properties fo:text-align="justify" style:justify-single-word="false"/>
      <style:text-properties fo:language="fr" fo:country="FR" officeooo:rsid="00436fa6" officeooo:paragraph-rsid="0067ae76"/>
    </style:style>
    <style:style style:name="P11" style:family="paragraph" style:parent-style-name="Standard" style:list-style-name="L4">
      <style:paragraph-properties fo:text-align="justify" style:justify-single-word="false"/>
      <style:text-properties fo:language="fr" fo:country="FR" officeooo:rsid="00436fa6" officeooo:paragraph-rsid="00436fa6"/>
    </style:style>
    <style:style style:name="P12" style:family="paragraph" style:parent-style-name="Standard" style:list-style-name="L4">
      <style:paragraph-properties fo:text-align="justify" style:justify-single-word="false"/>
      <style:text-properties fo:language="fr" fo:country="FR" officeooo:rsid="017e8757" officeooo:paragraph-rsid="017e8757"/>
    </style:style>
    <style:style style:name="T1" style:family="text">
      <style:text-properties officeooo:rsid="001e1d0c"/>
    </style:style>
    <style:style style:name="T2" style:family="text">
      <style:text-properties officeooo:rsid="002128cd"/>
    </style:style>
    <style:style style:name="T3" style:family="text">
      <style:text-properties officeooo:rsid="002cf8e7"/>
    </style:style>
    <style:style style:name="T4" style:family="text">
      <style:text-properties officeooo:rsid="002e5cbb"/>
    </style:style>
    <style:style style:name="T5" style:family="text">
      <style:text-properties officeooo:rsid="00377d2f"/>
    </style:style>
    <style:style style:name="T6" style:family="text">
      <style:text-properties officeooo:rsid="00393aca"/>
    </style:style>
    <style:style style:name="T7" style:family="text">
      <style:text-properties officeooo:rsid="0156ff70"/>
    </style:style>
    <style:style style:name="T8" style:family="text">
      <style:text-properties officeooo:rsid="0165fdb3"/>
    </style:style>
    <style:style style:name="T9" style:family="text">
      <style:text-properties officeooo:rsid="01708222"/>
    </style:style>
    <style:style style:name="T10" style:family="text">
      <style:text-properties officeooo:rsid="017126da"/>
    </style:style>
    <style:style style:name="T11" style:family="text">
      <style:text-properties officeooo:rsid="0171d27f"/>
    </style:style>
    <style:style style:name="T12" style:family="text">
      <style:text-properties officeooo:rsid="0172870a"/>
    </style:style>
    <style:style style:name="T13" style:family="text">
      <style:text-properties officeooo:rsid="01747c1e"/>
    </style:style>
    <style:style style:name="T14" style:family="text">
      <style:text-properties officeooo:rsid="017624da"/>
    </style:style>
    <style:style style:name="T15" style:family="text">
      <style:text-properties officeooo:rsid="0178886f"/>
    </style:style>
    <style:style style:name="T16" style:family="text">
      <style:text-properties officeooo:rsid="017bac2e"/>
    </style:style>
    <style:style style:name="T17" style:family="text">
      <style:text-properties officeooo:rsid="01817073"/>
    </style:style>
    <style:style style:name="T18" style:family="text">
      <style:text-properties officeooo:rsid="017f19e1"/>
    </style:style>
    <style:style style:name="T19" style:family="text">
      <style:text-properties officeooo:rsid="017fc62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1">L’</text:span>Invitation</text:h>
      <text:p text:style-name="P2"/>
      <text:p text:style-name="P2">Cher ami,</text:p>
      <text:p text:style-name="P2"/>
      <text:p text:style-name="P2"><text:tab/>Par la présente, vous êtes convié par Lord BumbleTwit à une séance de spiritisme dans sa résidence d’été.</text:p>
      <text:p text:style-name="P2"><text:tab/>Dans la cité où le labyrinthe guide les pénitents, les vitraux laissent des traces sanglantes sur la pierre et certaines dettes semblent survivre à la mort elle-même.</text:p>
      <text:p text:style-name="P2"><text:tab/>Lorsque l’odeur de la poudre à canon se sera enfin dissipée des rues et que les derniers échos de la Marseillaise auront cessé de troubler la nuit, nous tenterons d’entrer en communion avec l’âme de notre regretté ami Lord Bertham, assassiné il y a maintenant cinq ans.</text:p>
      <text:p text:style-name="P2"/>
      <text:p text:style-name="P2">Âmes sensibles, vous ne l’emporterez pas au paradis.</text:p>
      <text:p text:style-name="P2">Très cordialement,</text:p>
      <text:p text:style-name="P2"/>
      <text:p text:style-name="P2">Lord BumbleTwit</text:p>
      <text:p text:style-name="P2"/>
      <text:h text:style-name="P1" text:outline-level="1">La murder party</text:h>
      <text:p text:style-name="P2"/>
      <text:p text:style-name="P2"><text:tab/>Lord BumbleTwit a toujours été un curieux personnage. Révéré comme haï, ce gentleman ne laisse pas indifférent. Medium reconnu, il est parvenu à construire sa fortune grâce à ses fameuses "séances" avec lesquels il dialogue avec les défunts. Ces événements à huis-clos lui ont toujours permis d'attirer un publique hétéroclite constitué de jeunes gens avides de frissons, de vieillards en deuil et d'artistes curieux. Et bien entendu de généreux mécènes.</text:p>
      <text:p text:style-name="P2"/>
      <text:p text:style-name="P2"><text:tab/>Parmi les mécènes de Lord BumbleTwit, se trouvait Lord Bertham. Financier veuf, misanthrope et acariatre, Lord Bertham a fait don de sommes colossales à Lord BumbleTwit pendant les trois mois où celui-ci est demeuré chez lui. Pendant cette période, le médium utilisait ses talents afin de dialoguer avec l'esprit de Lady Bertham et de l'opinion de tous, cela avait permis à Lord Bertham de trouver une forme de paix. Malheureusement, celle-ci fut de courte durée car Lord Bertham finit assassiné dans bureau dans des circonstances suspectes. <text:span text:style-name="T2">L’affaire n’a jamais été élucidée.</text:span></text:p>
      <text:p text:style-name="P2"/>
      <text:p text:style-name="P2"><text:tab/>Nous nous trouvons cinq ans plus tard. Lord BumbleTwit a depuis racheté le manoir de Bertham. Vous pensiez que l'affaire de la mort de Lord Bertham était derrière vous quand Lord BumbleTwit vous a invité à une séance très particulière pendant laquelle l'esprit de Lord Bertham sera invoqué afin de l'interroger sur les circonstances de sa mort. Lors de cette soirée n'ont été invités que des gens triés sur le volet :</text:p>
      <text:p text:style-name="P2"/>
      <text:list text:style-name="L1">
        <text:list-item>
          <text:p text:style-name="P3">Amanda Red : Experte comptable de Lord Bertham et sceptique notoire.</text:p>
        </text:list-item>
        <text:list-item>
          <text:p text:style-name="P3">Le Dr Derelict : Médecin qui accompagnait Lord Bertham et inventeur à ses heures perdues.</text:p>
        </text:list-item>
        <text:list-item>
          <text:p text:style-name="P3">John Bertham : Fils cadet de Lord Bertham, viveur et amateur de théâtre.</text:p>
        </text:list-item>
        <text:list-item>
          <text:p text:style-name="P3">Gabriel Bertham : Fils ainé de Lord Bertham et médecin.</text:p>
        </text:list-item>
        <text:list-item>
          <text:p text:style-name="P3">Patience Bertham : Fille de Lord Bertham qui termine ses études de juriste.</text:p>
        </text:list-item>
        <text:list-item>
          <text:p text:style-name="P3">Tybalt LeFol : Grand ami de Lord Bertham et adepte des arts obscurs.</text:p>
        </text:list-item>
        <text:list-item>
          <text:p text:style-name="P3"><text:soft-page-break/>Luca Mason : livreur Amazon qui passait par là et a fini avec une coupe de champagne à la main.</text:p>
        </text:list-item>
      </text:list>
      <text:p text:style-name="P2"/>
      <text:p text:style-name="P2">Et les membres du personnel :</text:p>
      <text:p text:style-name="P2"/>
      <text:list text:style-name="L2">
        <text:list-item>
          <text:p text:style-name="P4">Archie Butler : Chef du personnel dirigeant la maison d'une main de fer.</text:p>
        </text:list-item>
        <text:list-item>
          <text:p text:style-name="P4">Bobby Watson : Homme à tout faire de la maison.</text:p>
        </text:list-item>
      </text:list>
      <text:h text:style-name="P5" text:outline-level="1">Wow ! et moi dans tout ça ?</text:h>
      <text:p text:style-name="P2"/>
      <text:p text:style-name="P2"><text:tab/>Dans cette murder party, vous allez incarner l'un des personnages présent<text:span text:style-name="T3">s</text:span> à la soirée. Dans votre fiche de personnage seront présentés succintement les informations suivantes :</text:p>
      <text:p text:style-name="P2"/>
      <text:list text:style-name="L3">
        <text:list-item>
          <text:p text:style-name="P6">Qui vous êtes.</text:p>
        </text:list-item>
        <text:list-item>
          <text:p text:style-name="P6">Si vous avez tué quelqu'un.</text:p>
        </text:list-item>
        <text:list-item>
          <text:p text:style-name="P6">Quel a été votre emploi du temps lors de <text:span text:style-name="T4">la</text:span> soirée et cinq ans plus tôt lors de la mort de Lord Bertham.</text:p>
        </text:list-item>
        <text:list-item>
          <text:p text:style-name="P6">Vos objectifs et les informations que vous voulez dissimuler.</text:p>
        </text:list-item>
      </text:list>
      <text:p text:style-name="P2"/>
      <text:p text:style-name="P2"><text:tab/>En discutant avec les autres joueurs et avec les organisateurs de la murder party, vous allez pouvoir découvrir ce qui s'est passé lors de la soirée et ainsi résoudre le mystère de la mort de Lord BumbleTwit mais faites attention : il y a un meurtrier parmi vous !</text:p>
      <text:p text:style-name="P2"/>
      <text:p text:style-name="P2"><text:tab/>Les informations que vous avez sur votre fiche de personnage sont censées donner quelques des éléments sur le personnage que vous allez incarner mais elles n'indiquent pas vraiment qui vous êtes. N'hésitez pas à rajouter de la richesse à votre personnage <text:span text:style-name="T5">en inventant une vie à votre personnage en dehors des tristes événements qui vous rassemblent </text:span><text:span text:style-name="T6">ce soir. </text:span>Si une information n'est pas spécifiée dans votre fiche de personnage, vous pouvez à priori la remplir.</text:p>
      <text:p text:style-name="P2"/>
      <text:h text:style-name="P5" text:outline-level="1">Règles de sécurité</text:h>
      <text:p text:style-name="P2"/>
      <text:p text:style-name="P2"><text:tab/>Certains des personnages présentés par les fiches de personnages possèdent des intentions douteuses voire criminelles à la manière d'un roman policier. Autant que possible, faites attention aux autres joueurs en incarnant vos personnages. Ce n'est pas parce qu'un propos est dit par un personnage fictif qu'il ne fait pas de mal.</text:p>
      <text:p text:style-name="P2"/>
      <text:p text:style-name="P2">Le jour J, les organisateurs présenteront des règles de sécurité qu'il faudra suivre.</text:p>
      <text:h text:style-name="P7" text:outline-level="1">Votre personnage : <text:span text:style-name="T7">Patience Bertham</text:span></text:h>
      <text:p text:style-name="P8"/>
      <text:p text:style-name="P9">Avez-vous tué quelqu'un ?</text:p>
      <text:p text:style-name="P8"/>
      <text:p text:style-name="P8">Vous avez (sans doute) tué Lord BumbleTwit (mais vous n'en êtes pas sûre). Vous avez empoisonné son verre.</text:p>
      <text:p text:style-name="P8"/>
      <text:p text:style-name="P9">Qui êtes-vous ?</text:p>
      <text:p text:style-name="P8"/>
      <text:p text:style-name="P8"><text:tab/>Fille de Lord Bertham, vous avez toujours été quelqu'un de très discrète et légèrement malicieuse. Vous aviez 15 ans lors de la mort de votre père, vous en avez 20 maintenant. Vous terminez vos études de juriste.</text:p>
      <text:h text:style-name="P5" text:outline-level="1">Votre emploi du temps</text:h>
      <text:p text:style-name="P8"/>
      <text:p text:style-name="P9">### Il y a 5 ans - Lord Bertham</text:p>
      <text:p text:style-name="P8"/>
      <text:p text:style-name="P8"><text:tab/>Vous n'avez jamais beaucoup aimé votre père. Il ne faisait pas grand chose pour se faire aimer non plus. Lord Bertham était un homme austère qui passait beaucoup trop de temps à se soucier des choses en dehors de son contrôle plutôt que de s'occuper de ce qui se trouvait sous ses yeux. Il parlait de rentabilité avec plus de passion que de ses enfants. Afin d'échapper aux colères terribles qu'il pouvait avoir, vous aviez pris l'habitude de vous cacher dans les passages secrets de la demeure que vous connaissez comme votre poche. La situation s'est calmée quand Lord BumbleTwit a commencé à fréquenter la maison. Faux medium, il faisait croire à votre père qu'il pouvait communiquer avec votre défunte mère. Vous l'avez aidé pour cela : vous lui avez montré tous les passages secrets de la maison et BumbleTwit vous a même demandé plusieurs fois de jouer la voix fantomatique qui sortait des murs de la maison. Lord Bertham se laissait berner et son tempérament commençait à s'adoucir. Vous avez vécu trois mois serein, votre père heureux de pouvoir retrouver la voix de sa femme.</text:p>
      <text:p text:style-name="P8"/>
      <text:p text:style-name="P8"><text:tab/>Malheureusement, cela ne pouvait pas durer. Le jour de la mort de Lord Bertham, vous étiez caché dans le passage secret attenant au bureau de Lord Bertham quand vous avez entendu une conversation entre votre père et Lord BumbleTwit. Vous avez clairement entendu les fragments suivants :</text:p>
      <text:p text:style-name="P8">- Je vais vous détruire Lord BumbleTwit : vous, votre ami charlatan et toutes les personnes qui vous ont aidé !</text:p>
      <text:p text:style-name="P8">- J'aurais aimé que notre relation se termine... dans de meilleures circonstances.</text:p>
      <text:p text:style-name="P8">Il y a eu un bruit ignoble dans la pièce d'à côté et le passage secret s'est ouvert sur Lord BumbleTwit, son éternel sourire ironique aux lèvres. Il vous a regardé sans être surpris :</text:p>
      <text:p text:style-name="P8">- Tiens moi ça veux-tu, je dois vérifier quelque chose. Il nous menaçait. Il allait tous nous détruire.</text:p>
      <text:p text:style-name="P8"><text:tab/>Et il a fouillé dans les papiers sur le bureau pour en extraire un papier qu'il s'empressa de brûler. C'est à ce moment que vous avez réalisé que vous teniez une horloge de bureau tachée de sang. Vous ne pouviez pas voir le corps de Lord Bertham depuis là où vous vous trouviez. Il y avait juste une tâche pourpre sur le sol. Vous avez tenté de vous approcher pour mieux voir mais Lord BumbleTwit vous a repoussé dans le passage secret :</text:p>
      <text:p text:style-name="P8">- Ce n'est pas un spectacle pour une adolescente.</text:p>
      <text:p text:style-name="P8">Il vous a ordonné de partir.</text:p>
      <text:p text:style-name="P8"><text:soft-page-break/></text:p>
      <text:p text:style-name="P8"><text:tab/>Vous n'avez rien dit à la police. En partie parce que vous vous sentez responsable des événements, en partie parce que vous n'aimiez pas votre père et en partie parce que vous ne savez toujours pas si la police a retrouvé vos empreintes sur l'arme. Quand votre frère a proposé de vendre la maison, vous n'avez levé aucune objection.</text:p>
      <text:p text:style-name="P8"/>
      <text:p text:style-name="P9">### Lord BumbleTwit</text:p>
      <text:p text:style-name="P8"/>
      <text:p text:style-name="P10"><text:tab/>Comment est-ce que les choses ont pu empirer à ce point ?</text:p>
      <text:p text:style-name="P10"><text:tab/>La séance de spiritisme organisée par Lord BumbleTwit vous a beaucoup effrayée. Que voulait-il donc accomplir au juste ? Vous avez été d'autant plus effrayé quand vous avez reçu un billet vous donnant rendez-vous en ville en amont de la séanc<text:span text:style-name="T8">e</text:span>. Lord du rendez-vous, Lord BumbleTwit semblait tendu et il vous a rapidement mis au courant de ce qui le tracassait : il avait reçu une lettre de menace et pensait que quelqu'un voulait le faire chanter pour la mort de Lord Bertham.</text:p>
      <text:p text:style-name="P10">- Ce ne serait pas vous qui essayez de me faire chanter ?</text:p>
      <text:p text:style-name="P10">- Bien sûr que non !</text:p>
      <text:p text:style-name="P10">- Voila qui est heureux. Cette affaire n'a que trop duré. Je compte bien la clore une bonne fois pour toute ce soir.</text:p>
      <text:p text:style-name="P10"><text:tab/>Son ton affable cachait à peine le tranchant de l'implication. Il changea alors de sujet, prenant des nouvelles de vous études de juriste et vous félicitant pour vos excellents résultats.</text:p>
      <text:p text:style-name="P10"/>
      <text:p text:style-name="P10"><text:tab/>C'est avec appréhension que vous vous êtes rendu à la demeure de Lord BumbleTwit vers 18h15. Il avait des rendez-vous dans l'après-midi et vous n'avez pas eu l'occasion d'échanger de nouveau avec lui. Tous les membres de la réception semblaient également dans l'expectative de ce qui pouvait se passer. Certains étaient enthousiastes comme ce charmant abruti de John mais le sentiment prédominant était bien l'inquiétude. Ne vous sentant pas en sécurité, vous vous êtes dit qu'il vous fallait une manière de vous défendre au cas où les choses venaient à empirer. Avisant la trousse du docteur Derelict, vous avez profité de son inattention afin de subtiliser une bouteille à l'allure menaçante qui se trouvait dans son sac.</text:p>
      <text:p text:style-name="P10"/>
      <text:p text:style-name="P10"><text:tab/>Le diner fut sans incident notable. S'est alors passé la séance de spiritisme à l'issue de laquelle "l'esprit de Lord Bertham" s'est mis à accuser son fils de sa mort. Les gens présents à la séance : Bobby Watson, Gabriel, John, Luca et le docteur se sont regardés d'un air gêné, ne sachant quoi faire de l'accusation qui venait d'être jeté à leur pieds.</text:p>
      <text:p text:style-name="P10"><text:tab/>Vous avez quitté la pièce discrètement, entendant de loin les cris indignés de John Bertham qui accusait son père de tous les mots et affirmant que c'était une aubaine qu'il soit mort. Pauvre John. Sa grande gueule ne ferait que l'attirer des ennuis. Vous avez alors repensé à votre discussion avec Lord BumbleTwit le matin. Vous avez repensé à votre père et à la manière dont BumbleTwit l'a assassiné : sans un mot et de sang froid. Il vous tuerait impitoyablement si cela lui permettait de se sauver. Vous avez alors pris une décision définitive. Aujourd'hui, vous vous étiez échappé de lui mais vous ne seriez jamais en sécurité tant que vous n'auriez pas éteint cette menace qui plane sur votre vie une bonne fois pour toute.</text:p>
      <text:p text:style-name="P10"/>
      <text:p text:style-name="P10"><text:tab/>Vous êtes sortie, vous dirigeant vers le passage secret <text:span text:style-name="T9">du jardin </text:span>pour aller dans son bureau. <text:span text:style-name="T10">Avisant l’intérieur de la pièce </text:span><text:span text:style-name="T11">vous avez vu Lord BumbleTwit endormi, </text:span><text:span text:style-name="T12">épuisé de la séance de spiritisme.</text:span><text:span text:style-name="T11"> </text:span><text:span text:style-name="T13">P</text:span>rofitant d<text:span text:style-name="T14">e l’occasion</text:span>, vous avez versé le contenu de la fiole de la trousse du docteur Derelict dans le verre de gin sur la table basse. <text:span text:style-name="T15">Pas un bruit, il ne s’est pas réveillé.</text:span></text:p>
      <text:p text:style-name="P10"/>
      <text:p text:style-name="P10"><text:soft-page-break/><text:tab/>En sortant du passage secret dans le jardin, vous êtes tombée sur Luca Mason qui s'inquiétait pour vous. <text:span text:style-name="T16">Vous l’avez remercié froidement avant de regagner le salon.</text:span></text:p>
      <text:p text:style-name="P10"/>
      <text:p text:style-name="P10"><text:tab/>Environ deux heures plus tard, le corps de Lord BumbleTwit a été découvert... avec un couteau dans le coeur ?</text:p>
      <text:p text:style-name="P8"/>
      <text:h text:style-name="Heading_20_1" text:outline-level="1">Informations que vous voulez garder secrètes</text:h>
      <text:p text:style-name="P8"/>
      <text:p text:style-name="P8"><text:tab/>Il y a plusieurs informations que vous préféreriez dissimuler. Vous ne pouvez pas révéler ces informations de vous-mêmes. Si un autre joueur vous pose des questions sur ces sujets, évitez les questions, échappez vous ou indignez-vous. Si un autre joueur vous présente l'information (il a découvert le peau aux roses), vous pouvez reconnaitre les faits mais que à ce joueur.</text:p>
      <text:p text:style-name="P8"/>
      <text:p text:style-name="P8">- Vous avez tué (?) Lord BumbleTwit.</text:p>
      <text:p text:style-name="P8">- Vous voulez aussi cacher votre implication dans la mort de votre père.</text:p>
      <text:p text:style-name="P8"/>
      <text:h text:style-name="Heading_20_1" text:outline-level="1">Objectifs</text:h>
      <text:p text:style-name="P8"/>
      <text:p text:style-name="P8">- Faites en sorte de ne pas être accusée de la mort de Lord BumbleTwit.</text:p>
      <text:p text:style-name="P8">- Trouvez ce que cachent vos frères John Bertham et Gabriel Bertham.</text:p>
      <text:p text:style-name="P8">- Trouvez <text:span text:style-name="T17">qui a envoyé la lettre de menace à Lord BumbleTwit</text:span></text:p>
      <text:p text:style-name="P8"/>
      <text:h text:style-name="Heading_20_1" text:outline-level="1">Conseils de jeux</text:h>
      <text:p text:style-name="P8"/>
      <text:list text:style-name="L4">
        <text:list-item>
          <text:p text:style-name="P11">Vous êtes sans doute la seule personne qui connait la vérité sur la mort de Lord Bertham. Si vous la révélez, vous risquer de devenir immédiatement suspecte. Il vaut mieux garder cela secret.</text:p>
        </text:list-item>
        <text:list-item>
          <text:p text:style-name="P12">Ne vous tenez pas à l’écart de l’enquête <text:span text:style-name="T18">car cela serait suspect </text:span>mais essayez <text:span text:style-name="T19">plutôt de </text:span>de disséminer des informations douteuses.</text:p>
        </text:list-item>
        <text:list-item>
          <text:p text:style-name="P11">- Amusez-vous bie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7-12T23:42:34.162208440</meta:creation-date>
    <dc:date>2026-07-13T01:06:22.389750127</dc:date>
    <meta:editing-duration>PT1H16M52S</meta:editing-duration>
    <meta:editing-cycles>297</meta:editing-cycles>
    <meta:generator>LibreOffice/26.2.4.2$Linux_X86_64 LibreOffice_project/620$Build-2</meta:generator>
    <meta:document-statistic meta:table-count="0" meta:image-count="0" meta:object-count="0" meta:page-count="5" meta:paragraph-count="75" meta:word-count="2082" meta:character-count="12002" meta:non-whitespace-character-count="9986"/>
  </office:meta>
</office:document-meta>
</file>