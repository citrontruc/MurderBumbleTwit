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justify" style:justify-single-word="false"/>
      <style:text-properties fo:language="fr" fo:country="FR"/>
    </style:style>
    <style:style style:name="P2" style:family="paragraph" style:parent-style-name="Standard">
      <style:paragraph-properties fo:text-align="justify" style:justify-single-word="false"/>
      <style:text-properties fo:language="fr" fo:country="FR"/>
    </style:style>
    <style:style style:name="P3" style:family="paragraph" style:parent-style-name="Standard" style:list-style-name="L1">
      <style:paragraph-properties fo:text-align="justify" style:justify-single-word="false"/>
      <style:text-properties fo:language="fr" fo:country="FR"/>
    </style:style>
    <style:style style:name="P4" style:family="paragraph" style:parent-style-name="Standard" style:list-style-name="L2">
      <style:paragraph-properties fo:text-align="justify" style:justify-single-word="false"/>
      <style:text-properties fo:language="fr" fo:country="FR"/>
    </style:style>
    <style:style style:name="P5" style:family="paragraph" style:parent-style-name="Heading_20_1">
      <style:text-properties fo:language="fr" fo:country="FR"/>
    </style:style>
    <style:style style:name="P6" style:family="paragraph" style:parent-style-name="Standard" style:list-style-name="L3">
      <style:paragraph-properties fo:text-align="justify" style:justify-single-word="false"/>
      <style:text-properties fo:language="fr" fo:country="FR"/>
    </style:style>
    <style:style style:name="P7" style:family="paragraph" style:parent-style-name="Heading_20_1">
      <style:paragraph-properties fo:break-before="page"/>
      <style:text-properties fo:language="fr" fo:country="FR"/>
    </style:style>
    <style:style style:name="P8" style:family="paragraph" style:parent-style-name="Standard">
      <style:paragraph-properties fo:text-align="justify" style:justify-single-word="false"/>
      <style:text-properties fo:language="fr" fo:country="FR" officeooo:rsid="00436fa6" officeooo:paragraph-rsid="00436fa6"/>
    </style:style>
    <style:style style:name="P9" style:family="paragraph" style:parent-style-name="Standard">
      <style:paragraph-properties fo:text-align="justify" style:justify-single-word="false"/>
      <style:text-properties fo:language="fr" fo:country="FR" fo:font-weight="bold" officeooo:rsid="00436fa6" officeooo:paragraph-rsid="00436fa6" style:font-weight-asian="bold" style:font-weight-complex="bold"/>
    </style:style>
    <style:style style:name="P10" style:family="paragraph" style:parent-style-name="Standard">
      <style:paragraph-properties fo:text-align="justify" style:justify-single-word="false"/>
      <style:text-properties fo:language="fr" fo:country="FR" officeooo:rsid="018a9867" officeooo:paragraph-rsid="018a9867"/>
    </style:style>
    <style:style style:name="P11" style:family="paragraph" style:parent-style-name="Standard">
      <style:paragraph-properties fo:text-align="justify" style:justify-single-word="false"/>
      <style:text-properties fo:language="fr" fo:country="FR" officeooo:rsid="00436fa6" officeooo:paragraph-rsid="019c3d36"/>
    </style:style>
    <style:style style:name="P12" style:family="paragraph" style:parent-style-name="Standard">
      <style:paragraph-properties fo:text-align="justify" style:justify-single-word="false"/>
      <style:text-properties fo:language="fr" fo:country="FR" officeooo:rsid="00436fa6" officeooo:paragraph-rsid="0067ae76"/>
    </style:style>
    <style:style style:name="P13" style:family="paragraph" style:parent-style-name="Standard">
      <style:paragraph-properties fo:text-align="justify" style:justify-single-word="false"/>
      <style:text-properties fo:language="fr" fo:country="FR" officeooo:rsid="017e8757" officeooo:paragraph-rsid="00436fa6"/>
    </style:style>
    <style:style style:name="P14" style:family="paragraph" style:parent-style-name="Standard" style:list-style-name="L4">
      <style:paragraph-properties fo:text-align="justify" style:justify-single-word="false"/>
      <style:text-properties fo:language="fr" fo:country="FR" officeooo:rsid="018a73f6" officeooo:paragraph-rsid="018a73f6"/>
    </style:style>
    <style:style style:name="P15" style:family="paragraph" style:parent-style-name="Standard" style:list-style-name="L4">
      <style:paragraph-properties fo:text-align="justify" style:justify-single-word="false"/>
      <style:text-properties fo:language="fr" fo:country="FR" officeooo:rsid="00436fa6" officeooo:paragraph-rsid="00436fa6"/>
    </style:style>
    <style:style style:name="T1" style:family="text">
      <style:text-properties officeooo:rsid="001e1d0c"/>
    </style:style>
    <style:style style:name="T2" style:family="text">
      <style:text-properties officeooo:rsid="002128cd"/>
    </style:style>
    <style:style style:name="T3" style:family="text">
      <style:text-properties officeooo:rsid="002cf8e7"/>
    </style:style>
    <style:style style:name="T4" style:family="text">
      <style:text-properties officeooo:rsid="002e5cbb"/>
    </style:style>
    <style:style style:name="T5" style:family="text">
      <style:text-properties officeooo:rsid="00377d2f"/>
    </style:style>
    <style:style style:name="T6" style:family="text">
      <style:text-properties officeooo:rsid="00393aca"/>
    </style:style>
    <style:style style:name="T7" style:family="text">
      <style:text-properties officeooo:rsid="0182497e"/>
    </style:style>
    <style:style style:name="T8" style:family="text">
      <style:text-properties officeooo:rsid="019002c7"/>
    </style:style>
    <style:style style:name="T9" style:family="text">
      <style:text-properties officeooo:rsid="01911adf"/>
    </style:style>
    <style:style style:name="T10" style:family="text">
      <style:text-properties officeooo:rsid="019137ab"/>
    </style:style>
    <style:style style:name="T11" style:family="text">
      <style:text-properties officeooo:rsid="0193a5b5"/>
    </style:style>
    <style:style style:name="T12" style:family="text">
      <style:text-properties officeooo:rsid="0195b072"/>
    </style:style>
    <style:style style:name="T13" style:family="text">
      <style:text-properties officeooo:rsid="01971203"/>
    </style:style>
    <style:style style:name="T14" style:family="text">
      <style:text-properties officeooo:rsid="019854a3"/>
    </style:style>
    <style:style style:name="T15" style:family="text">
      <style:text-properties officeooo:rsid="019c3d36"/>
    </style:style>
    <style:style style:name="T16" style:family="text">
      <style:text-properties officeooo:rsid="019cae3f"/>
    </style:style>
    <style:style style:name="T17" style:family="text">
      <style:text-properties officeooo:rsid="01a6abd9"/>
    </style:style>
    <style:style style:name="T18" style:family="text">
      <style:text-properties officeooo:rsid="01a6b218"/>
    </style:style>
    <style:style style:name="T19" style:family="text">
      <style:text-properties officeooo:rsid="01ace61e"/>
    </style:style>
    <style:style style:name="T20" style:family="text">
      <style:text-properties officeooo:rsid="01ae1cfa"/>
    </style:style>
    <style:style style:name="T21" style:family="text">
      <style:text-properties officeooo:rsid="018421d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L’</text:span>Invitation</text:h>
      <text:p text:style-name="P2"/>
      <text:p text:style-name="P2">Cher ami,</text:p>
      <text:p text:style-name="P2"/>
      <text:p text:style-name="P2"><text:tab/>Par la présente, vous êtes convié par Lord BumbleTwit à une séance de spiritisme dans sa résidence d’été.</text:p>
      <text:p text:style-name="P2"><text:tab/>Dans la cité où le labyrinthe guide les pénitents, les vitraux laissent des traces sanglantes sur la pierre et certaines dettes semblent survivre à la mort elle-même.</text:p>
      <text:p text:style-name="P2"><text:tab/>Lorsque l’odeur de la poudre à canon se sera enfin dissipée des rues et que les derniers échos de la Marseillaise auront cessé de troubler la nuit, nous tenterons d’entrer en communion avec l’âme de notre regretté ami Lord Bertham, assassiné il y a maintenant cinq ans.</text:p>
      <text:p text:style-name="P2"/>
      <text:p text:style-name="P2">Âmes sensibles, vous ne l’emporterez pas au paradis.</text:p>
      <text:p text:style-name="P2">Très cordialement,</text:p>
      <text:p text:style-name="P2"/>
      <text:p text:style-name="P2">Lord BumbleTwit</text:p>
      <text:p text:style-name="P2"/>
      <text:h text:style-name="P1" text:outline-level="1">La murder party</text:h>
      <text:p text:style-name="P2"/>
      <text:p text:style-name="P2"><text:tab/>Lord BumbleTwit a toujours été un curieux personnage. Révéré comme haï, ce gentleman ne laisse pas indifférent. Medium reconnu, il est parvenu à construire sa fortune grâce à ses fameuses "séances" avec lesquels il dialogue avec les défunts. Ces événements à huis-clos lui ont toujours permis d'attirer un publique hétéroclite constitué de jeunes gens avides de frissons, de vieillards en deuil et d'artistes curieux. Et bien entendu de généreux mécènes.</text:p>
      <text:p text:style-name="P2"/>
      <text:p text:style-name="P2"><text:tab/>Parmi les mécènes de Lord BumbleTwit, se trouvait Lord Bertham. Financier veuf, misanthrope et acariatre, Lord Bertham a fait don de sommes colossales à Lord BumbleTwit pendant les trois mois où celui-ci est demeuré chez lui. Pendant cette période, le médium utilisait ses talents afin de dialoguer avec l'esprit de Lady Bertham et de l'opinion de tous, cela avait permis à Lord Bertham de trouver une forme de paix. Malheureusement, celle-ci fut de courte durée car Lord Bertham finit assassiné dans bureau dans des circonstances suspectes. <text:span text:style-name="T2">L’affaire n’a jamais été élucidée.</text:span></text:p>
      <text:p text:style-name="P2"/>
      <text:p text:style-name="P2"><text:tab/>Nous nous trouvons cinq ans plus tard. Lord BumbleTwit a depuis racheté le manoir de Bertham. Vous pensiez que l'affaire de la mort de Lord Bertham était derrière vous quand Lord BumbleTwit vous a invité à une séance très particulière pendant laquelle l'esprit de Lord Bertham sera invoqué afin de l'interroger sur les circonstances de sa mort. Lors de cette soirée n'ont été invités que des gens triés sur le volet :</text:p>
      <text:p text:style-name="P2"/>
      <text:list text:style-name="L1">
        <text:list-item>
          <text:p text:style-name="P3">Amanda Red : Experte comptable de Lord Bertham et sceptique notoire.</text:p>
        </text:list-item>
        <text:list-item>
          <text:p text:style-name="P3">Le Dr Derelict : Médecin qui accompagnait Lord Bertham et inventeur à ses heures perdues.</text:p>
        </text:list-item>
        <text:list-item>
          <text:p text:style-name="P3">John Bertham : Fils cadet de Lord Bertham, viveur et amateur de théâtre.</text:p>
        </text:list-item>
        <text:list-item>
          <text:p text:style-name="P3">Gabriel Bertham : Fils ainé de Lord Bertham et médecin.</text:p>
        </text:list-item>
        <text:list-item>
          <text:p text:style-name="P3">Patience Bertham : Fille de Lord Bertham qui termine ses études de juriste.</text:p>
        </text:list-item>
        <text:list-item>
          <text:p text:style-name="P3">Tybalt LeFol : Grand ami de Lord Bertham et adepte des arts obscurs.</text:p>
        </text:list-item>
        <text:list-item>
          <text:p text:style-name="P3"><text:soft-page-break/>Luca Mason : livreur Amazon qui passait par là et a fini avec une coupe de champagne à la main.</text:p>
        </text:list-item>
      </text:list>
      <text:p text:style-name="P2"/>
      <text:p text:style-name="P2">Et les membres du personnel :</text:p>
      <text:p text:style-name="P2"/>
      <text:list text:style-name="L2">
        <text:list-item>
          <text:p text:style-name="P4">Archie Butler : Chef du personnel dirigeant la maison d'une main de fer.</text:p>
        </text:list-item>
        <text:list-item>
          <text:p text:style-name="P4">Bobby Watson : Homme à tout faire de la maison.</text:p>
        </text:list-item>
      </text:list>
      <text:h text:style-name="P5" text:outline-level="1">Wow ! et moi dans tout ça ?</text:h>
      <text:p text:style-name="P2"/>
      <text:p text:style-name="P2"><text:tab/>Dans cette murder party, vous allez incarner l'un des personnages présent<text:span text:style-name="T3">s</text:span> à la soirée. Dans votre fiche de personnage seront présentés succintement les informations suivantes :</text:p>
      <text:p text:style-name="P2"/>
      <text:list text:style-name="L3">
        <text:list-item>
          <text:p text:style-name="P6">Qui vous êtes.</text:p>
        </text:list-item>
        <text:list-item>
          <text:p text:style-name="P6">Si vous avez tué quelqu'un.</text:p>
        </text:list-item>
        <text:list-item>
          <text:p text:style-name="P6">Quel a été votre emploi du temps lors de <text:span text:style-name="T4">la</text:span> soirée et cinq ans plus tôt lors de la mort de Lord Bertham.</text:p>
        </text:list-item>
        <text:list-item>
          <text:p text:style-name="P6">Vos objectifs et les informations que vous voulez dissimuler.</text:p>
        </text:list-item>
      </text:list>
      <text:p text:style-name="P2"/>
      <text:p text:style-name="P2"><text:tab/>En discutant avec les autres joueurs et avec les organisateurs de la murder party, vous allez pouvoir découvrir ce qui s'est passé lors de la soirée et ainsi résoudre le mystère de la mort de Lord BumbleTwit mais faites attention : il y a un meurtrier parmi vous !</text:p>
      <text:p text:style-name="P2"/>
      <text:p text:style-name="P2"><text:tab/>Les informations que vous avez sur votre fiche de personnage sont censées donner quelques des éléments sur le personnage que vous allez incarner mais elles n'indiquent pas vraiment qui vous êtes. N'hésitez pas à rajouter de la richesse à votre personnage <text:span text:style-name="T5">en inventant une vie à votre personnage en dehors des tristes événements qui vous rassemblent </text:span><text:span text:style-name="T6">ce soir. </text:span>Si une information n'est pas spécifiée dans votre fiche de personnage, vous pouvez à priori la remplir.</text:p>
      <text:p text:style-name="P2"/>
      <text:h text:style-name="P5" text:outline-level="1">Règles de sécurité</text:h>
      <text:p text:style-name="P2"/>
      <text:p text:style-name="P2"><text:tab/>Certains des personnages présentés par les fiches de personnages possèdent des intentions douteuses voire criminelles à la manière d'un roman policier. Autant que possible, faites attention aux autres joueurs en incarnant vos personnages. Ce n'est pas parce qu'un propos est dit par un personnage fictif qu'il ne fait pas de mal.</text:p>
      <text:p text:style-name="P2"/>
      <text:p text:style-name="P2">Le jour J, les organisateurs présenteront des règles de sécurité qu'il faudra suivre.</text:p>
      <text:h text:style-name="P7" text:outline-level="1">Votre personnage : <text:span text:style-name="T7">Tybalt Lefol</text:span></text:h>
      <text:p text:style-name="P8"/>
      <text:p text:style-name="P9">Avez-vous tué quelqu'un ?</text:p>
      <text:p text:style-name="P8"/>
      <text:p text:style-name="P10">Non.</text:p>
      <text:p text:style-name="P8"/>
      <text:p text:style-name="P9">Qui êtes-vous ?</text:p>
      <text:p text:style-name="P8"/>
      <text:p text:style-name="P8"><text:tab/>Meilleur ami de Lord BumbleTwit, vous lui servez de complice lors des fausses séances de spiritisme. Vous faites tantôt la voix des morts à l'aide d'engins pour modifier la voix, tantôt esprit qui secoue les chaînes dans le grenier ou encore vous preniez le rôle de participant saisi d'une transe mystique. Vous travaillez avec Lord BumbleTwit depuis longtemps. Notamment, vous l'avez aidé à berner Lord Bertham il y a cinq ans.</text:p>
      <text:p text:style-name="P8"/>
      <text:p text:style-name="P8">D'un naturel insousciant, vous prenez tout à la blague et vous ne vous rendez pas toujours compte des conséquences de vos actes.</text:p>
      <text:h text:style-name="P5" text:outline-level="1">Votre emploi du temps</text:h>
      <text:p text:style-name="P8"/>
      <text:p text:style-name="P9">### Il y a 5 ans - Lord Bertham</text:p>
      <text:p text:style-name="P8"/>
      <text:p text:style-name="P8"><text:tab/>Lord Bertham n'était pour vous qu'un aristo plein de thunes et en vous n'avez eu aucun scrupule à le berner avec Lord BumbleTwit. En utilisant les talents d'acteurs de Lord BumbleTwit et votre complicité discrète, vous lui faisiez croire que vous étiez capable de parler avec sa femme décédée. Vous étiez le second rôle qui détourne l'attention des spectateurs ou active discrètement un méchanisme caché. Après deux mois d'amusement, vous avez dû vous absenter pour un voyage de travail. Vous <text:span text:style-name="T8">saviez</text:span> que Lord BumbleTwit avait trouvé un autre complice et vous êtes donc parti l'esprit serein à votre voyage.</text:p>
      <text:p text:style-name="P8"/>
      <text:p text:style-name="P8"><text:tab/>C'est par hasard que vous avez appris que Lord Bertham croyait tellement à votre numéro qu'il avait décidé de léguer toute sa fortune à Lord BumbleTwit ! <text:span text:style-name="T9">De vilains </text:span>remords <text:span text:style-name="T10">vous ont alors déchiré</text:span> et vous lui avez envoyé une lettre anonyme pour lui avouer que les séances de spiritismes pendant lesquelles il croyait voir sa femme n'étaient qu'une supercherie. <text:span text:style-name="T11">Une supercherie</text:span> pleine de bonnes intentions visant à alléger son chagrin, <text:span text:style-name="T12">mais supercherie tout de même</text:span>. Vous avez ensuite oublié l'affaire temporai<text:span text:style-name="T13">r</text:span>ement.</text:p>
      <text:p text:style-name="P8"/>
      <text:p text:style-name="P8"><text:tab/>La prochaine fois que vous avez croisé Lord BumbleTwit, il vous a appris avec tristesse que Lord Bertham avait été asssassiné dans des circonstances mystérieuses. On n'avait retrouvé ni le coupable ni l'arme du crime. <text:span text:style-name="T14">Le médium</text:span> semblait devasté par la tournure qu'avait pris les événements.</text:p>
      <text:p text:style-name="P8"/>
      <text:p text:style-name="P9">### Lord BumbleTwit</text:p>
      <text:p text:style-name="P8"/>
      <text:p text:style-name="P11"><text:tab/>Pour la séance du soir, Lord BumbleTwit vous avait invité pour lui servir de complice. En effet, il disait avoir bien réfléchi à l'affaire Bertham comme il l'appelait et pour lui, il n'y avait qu'une explication plausible. Au déjeuner, vous avez revu ensemble les détails de la soirée pour la séance de spiritisme. Vous deviez joué le rôle de "l'esprit dérangé qui revient à la vie". Caché dans un passage <text:soft-page-break/>secret attenant à la salle de spiritisme, vous secouez des chaines et tirez sur les fils électriques pour faire osciller les lampes. Avec un bon acteur et quelques sons inquiétants, l'illusion est impressionante pour les esprits crédules ! Avec enthousiasme, Lord BumbleTwit vous a alors parlé d'un dernier ingrédient qu'on lui <text:span text:style-name="T15">avait</text:span> suggéré pour parfaire le spectacle. Un colis devait arriver dans la soirée pour <text:span text:style-name="T16">cela</text:span>. Profitant de l'occasion et de la bonne humeur de Lord BumbleTwit, vous lui avez alors avoué que vous avez trahi son secret auprès de Lord Bertham et vous lui avez parlé de la lettre anonyme. Lord BumbleTwit est alors rentré dans une rage folle et vous a traité plusieurs fois de traitre !</text:p>
      <text:p text:style-name="P12"/>
      <text:p text:style-name="P12"><text:tab/>Vous avez passé la journée en ville à culpabiliser et à vous demander si vous n'auriez pas dû cacher à BumbleTwit votre faute. Vous avez bien essayé de l'appeler au téléphone dans l'apres-midi mais il vous a rembarré, vous traitant de nouveau de traitre.</text:p>
      <text:p text:style-name="P12"/>
      <text:p text:style-name="P12"><text:tab/>Vous n'êtes revenu sur place que pour la séance de spiritisme. Vous êtes arrivé au moment où le repas se terminait. En vous voyant, Lord BumbleTwit vous a lancé un regard assassin mais n'a fait aucun commentaire, la session de spiritisme allait démarrer. Vous êtes alors sorti pour contourner la maison et gagner le passage secret à côté de la salle où devait se passer la séance de spiritisme.</text:p>
      <text:p text:style-name="P12"/>
      <text:p text:style-name="P12"><text:tab/>Après la représentation, Lord BumbleTwit va toujours se réfugier dans son bureau soit-disant pour "se reposer". <text:span text:style-name="T17">En bon réalisateur, </text:span><text:span text:style-name="T18">i</text:span>l faisait toujours cela pour laisser les spaectateurs digérer ce qui venait de se produire. Il existe un deuxième passage secret de l'autre côté de la maison pour gagner son bureau. <text:span text:style-name="T19">Fallait-il aller le voir pour tenter de s’expliquer ? Quelques </text:span><text:span text:style-name="T20">coupes de champagne aidant, vous vous êtes dit que vous</text:span> deviez le voir. Sur le chemin du passage, vous avez vu une ombre se déplacer dans le jardin mais vous n'y avez pas prêté plus attention que cela.</text:p>
      <text:p text:style-name="P12"/>
      <text:p text:style-name="P12"><text:tab/>Arrivant dans le bureau de Lord BumbleTwit, vous l'avez trouvé vieilli. Cette soirée l'avait épuisé. Assis dans son fautueil, un verre de son gin favori posé sur la table basse à côté du cendrier, il regardait dans le vague et n'a guère preté attention à ce que vous lui disiez. Vous avez fini par vous taire, laissant le silence vous recouvrir comme une chappe de neige.</text:p>
      <text:p text:style-name="P12"/>
      <text:p text:style-name="P12"><text:tab/>Quand Lord BumbleTwit a finalement parlé, il vous a regardé dans les yeux et a juste dit "mon ami, vous ne savez pas ce que vous avez fait." Vous auriez aimé en savoir plus, mais on a alors frappé à la porte violemment. Vous avez juste eu le temps de vous sauver par le passage secret par lequel vous étiez entré et à regagner le grand salon avec les autres invités.</text:p>
      <text:p text:style-name="P12"/>
      <text:p text:style-name="P12"><text:tab/>La prochaine fois que vous avez vu Lord BumbleTwit, il avait un couteau profondément planté dans le corps.</text:p>
      <text:p text:style-name="P8"/>
      <text:h text:style-name="Heading_20_1" text:outline-level="1">Informations que vous voulez garder secrètes</text:h>
      <text:p text:style-name="P8"/>
      <text:p text:style-name="P8"><text:tab/>Il y a plusieurs informations que vous préféreriez dissimuler. Vous ne pouvez pas révéler ces informations de vous-mêmes. Si un autre joueur vous pose des questions sur ces sujets, évitez les questions, échappez vous ou indignez-vous. Si un autre joueur vous présente l'information (il a découvert le peau aux roses), vous pouvez reconnaitre les faits mais que à ce joueur.</text:p>
      <text:p text:style-name="P8"/>
      <text:p text:style-name="P8">- Vous avez trahi Lord BumbleTwit.</text:p>
      <text:p text:style-name="P8">- Vous préféreriez aussi qu'on ne découvre comment Lord BumbleTwit s'y prenait pour ses fausses séances de spiritisme.</text:p>
      <text:p text:style-name="P8"><text:soft-page-break/></text:p>
      <text:h text:style-name="Heading_20_1" text:outline-level="1">Objectifs</text:h>
      <text:p text:style-name="P8"/>
      <text:p text:style-name="P8">- Trouvez qui a tué Lord BumbleTwit.</text:p>
      <text:p text:style-name="P8">- Découvrez le lien de tous les invités avec Lord Bertham.</text:p>
      <text:p text:style-name="P8">- Essayez d’<text:span text:style-name="T21">apporter un peu de légèreté de d’insousciance en ces heures sombres.</text:span></text:p>
      <text:p text:style-name="P8"/>
      <text:h text:style-name="Heading_20_1" text:outline-level="1">Conseils de jeux</text:h>
      <text:p text:style-name="P13"/>
      <text:list text:style-name="L4">
        <text:list-item>
          <text:p text:style-name="P14">Vous avez raté une bonne partie des événements ; la première étape serait de reconstruire la timeline des événements.</text:p>
        </text:list-item>
        <text:list-item>
          <text:p text:style-name="P15">Amusez-vous bie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7-12T23:42:34.162208440</meta:creation-date>
    <dc:date>2026-07-13T01:14:52.051137066</dc:date>
    <meta:editing-duration>PT1H24M53S</meta:editing-duration>
    <meta:editing-cycles>332</meta:editing-cycles>
    <meta:generator>LibreOffice/26.2.4.2$Linux_X86_64 LibreOffice_project/620$Build-2</meta:generator>
    <meta:document-statistic meta:table-count="0" meta:image-count="0" meta:object-count="0" meta:page-count="5" meta:paragraph-count="63" meta:word-count="1797" meta:character-count="10581" meta:non-whitespace-character-count="8840"/>
  </office:meta>
</office:document-meta>
</file>