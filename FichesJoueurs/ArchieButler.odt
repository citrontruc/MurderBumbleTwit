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list-style-name="L1">
      <style:paragraph-properties fo:text-align="justify" style:justify-single-word="false"/>
      <style:text-properties fo:language="fr" fo:country="FR"/>
    </style:style>
    <style:style style:name="P4" style:family="paragraph" style:parent-style-name="Standard" style:list-style-name="L2">
      <style:paragraph-properties fo:text-align="justify" style:justify-single-word="false"/>
      <style:text-properties fo:language="fr" fo:country="FR"/>
    </style:style>
    <style:style style:name="P5" style:family="paragraph" style:parent-style-name="Heading_20_1">
      <style:text-properties fo:language="fr" fo:country="FR"/>
    </style:style>
    <style:style style:name="P6" style:family="paragraph" style:parent-style-name="Standard" style:list-style-name="L3">
      <style:paragraph-properties fo:text-align="justify" style:justify-single-wor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Standard">
      <style:paragraph-properties fo:text-align="justify" style:justify-single-word="false"/>
      <style:text-properties fo:language="fr" fo:country="FR" officeooo:rsid="00436fa6" officeooo:paragraph-rsid="00436fa6"/>
    </style:style>
    <style:style style:name="P9" style:family="paragraph" style:parent-style-name="Standard">
      <style:paragraph-properties fo:text-align="justify" style:justify-single-word="false"/>
      <style:text-properties fo:language="fr" fo:country="FR" fo:font-weight="bold" officeooo:rsid="00436fa6" officeooo:paragraph-rsid="00436fa6" style:font-weight-asian="bold" style:font-weight-complex="bold"/>
    </style:style>
    <style:style style:name="P10" style:family="paragraph" style:parent-style-name="Standard" style:list-style-name="L4">
      <style:paragraph-properties fo:text-align="justify" style:justify-single-word="false"/>
      <style:text-properties fo:language="fr" fo:country="FR" officeooo:rsid="00436fa6" officeooo:paragraph-rsid="00436fa6"/>
    </style:style>
    <style:style style:name="P11" style:family="paragraph" style:parent-style-name="Standard">
      <style:paragraph-properties fo:text-align="justify" style:justify-single-word="false"/>
      <style:text-properties fo:language="fr" fo:country="FR" officeooo:rsid="00436fa6" officeooo:paragraph-rsid="0067ae76"/>
    </style:style>
    <style:style style:name="P12" style:family="paragraph" style:parent-style-name="Standard" style:list-style-name="L5">
      <style:paragraph-properties fo:text-align="justify" style:justify-single-word="false"/>
      <style:text-properties fo:language="fr" fo:country="FR" officeooo:rsid="00436fa6" officeooo:paragraph-rsid="00436fa6"/>
    </style:style>
    <style:style style:name="T1" style:family="text">
      <style:text-properties officeooo:rsid="001e1d0c"/>
    </style:style>
    <style:style style:name="T2" style:family="text">
      <style:text-properties officeooo:rsid="002128cd"/>
    </style:style>
    <style:style style:name="T3" style:family="text">
      <style:text-properties officeooo:rsid="002cf8e7"/>
    </style:style>
    <style:style style:name="T4" style:family="text">
      <style:text-properties officeooo:rsid="002e5cbb"/>
    </style:style>
    <style:style style:name="T5" style:family="text">
      <style:text-properties officeooo:rsid="00377d2f"/>
    </style:style>
    <style:style style:name="T6" style:family="text">
      <style:text-properties officeooo:rsid="00393aca"/>
    </style:style>
    <style:style style:name="T7" style:family="text">
      <style:text-properties officeooo:rsid="00900ca3"/>
    </style:style>
    <style:style style:name="T8" style:family="text">
      <style:text-properties officeooo:rsid="00915d0d"/>
    </style:style>
    <style:style style:name="T9" style:family="text">
      <style:text-properties officeooo:rsid="0092a0bb"/>
    </style:style>
    <style:style style:name="T10" style:family="text">
      <style:text-properties officeooo:rsid="0095968d"/>
    </style:style>
    <style:style style:name="T11" style:family="text">
      <style:text-properties officeooo:rsid="0097ffe7"/>
    </style:style>
    <style:style style:name="T12" style:family="text">
      <style:text-properties officeooo:rsid="00998fd4"/>
    </style:style>
    <style:style style:name="T13" style:family="text">
      <style:text-properties officeooo:rsid="009ce281"/>
    </style:style>
    <style:style style:name="T14" style:family="text">
      <style:text-properties officeooo:rsid="00a0f6ca"/>
    </style:style>
    <style:style style:name="T15" style:family="text">
      <style:text-properties officeooo:rsid="00a3cb4f"/>
    </style:style>
    <style:style style:name="T16" style:family="text">
      <style:text-properties officeooo:rsid="00b42220"/>
    </style:style>
    <style:style style:name="T17" style:family="text">
      <style:text-properties officeooo:rsid="00a5901a"/>
    </style:style>
    <style:style style:name="T18" style:family="text">
      <style:text-properties officeooo:rsid="00a78a91"/>
    </style:style>
    <style:style style:name="T19" style:family="text">
      <style:text-properties officeooo:rsid="00ad18fc"/>
    </style:style>
    <style:style style:name="T20" style:family="text">
      <style:text-properties officeooo:rsid="00a16316"/>
    </style:style>
    <style:style style:name="T21" style:family="text">
      <style:text-properties officeooo:rsid="00b133b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text:span>Invitation</text:h>
      <text:p text:style-name="P2"/>
      <text:p text:style-name="P2">Cher ami,</text:p>
      <text:p text:style-name="P2"/>
      <text:p text:style-name="P2"><text:tab/>Par la présente, vous êtes convié par Lord BumbleTwit à une séance de spiritisme dans sa résidence d’été.</text:p>
      <text:p text:style-name="P2"><text:tab/>Dans la cité où le labyrinthe guide les pénitents, les vitraux laissent des traces sanglantes sur la pierre et certaines dettes semblent survivre à la mort elle-même.</text:p>
      <text:p text:style-name="P2"><text:tab/>Lorsque l’odeur de la poudre à canon se sera enfin dissipée des rues et que les derniers échos de la Marseillaise auront cessé de troubler la nuit, nous tenterons d’entrer en communion avec l’âme de notre regretté ami Lord Bertham, assassiné il y a maintenant cinq ans.</text:p>
      <text:p text:style-name="P2"/>
      <text:p text:style-name="P2">Âmes sensibles, vous ne l’emporterez pas au paradis.</text:p>
      <text:p text:style-name="P2">Très cordialement,</text:p>
      <text:p text:style-name="P2"/>
      <text:p text:style-name="P2">Lord BumbleTwit</text:p>
      <text:p text:style-name="P2"/>
      <text:h text:style-name="P1" text:outline-level="1">La murder party</text:h>
      <text:p text:style-name="P2"/>
      <text:p text:style-name="P2"><text:tab/>Lord BumbleTwit a toujours été un curieux personnage. Révéré comme haï, ce gentleman ne laisse pas indifférent. Medium reconnu, il est parvenu à construire sa fortune grâce à ses fameuses "séances" avec lesquels il dialogue avec les défunts. Ces événements à huis-clos lui ont toujours permis d'attirer un publique hétéroclite constitué de jeunes gens avides de frissons, de vieillards en deuil et d'artistes curieux. Et bien entendu de généreux mécènes.</text:p>
      <text:p text:style-name="P2"/>
      <text:p text:style-name="P2"><text:tab/>Parmi les mécènes de Lord BumbleTwit, se trouvait Lord Bertham. Financier veuf, misanthrope et acariatre, Lord Bertham a fait don de sommes colossales à Lord BumbleTwit pendant les trois mois où celui-ci est demeuré chez lui. Pendant cette période, le médium utilisait ses talents afin de dialoguer avec l'esprit de Lady Bertham et de l'opinion de tous, cela avait permis à Lord Bertham de trouver une forme de paix. Malheureusement, celle-ci fut de courte durée car Lord Bertham finit assassiné dans bureau dans des circonstances suspectes. <text:span text:style-name="T2">L’affaire n’a jamais été élucidée.</text:span></text:p>
      <text:p text:style-name="P2"/>
      <text:p text:style-name="P2"><text:tab/>Nous nous trouvons cinq ans plus tard. Lord BumbleTwit a depuis racheté le manoir de Bertham. Vous pensiez que l'affaire de la mort de Lord Bertham était derrière vous quand Lord BumbleTwit vous a invité à une séance très particulière pendant laquelle l'esprit de Lord Bertham sera invoqué afin de l'interroger sur les circonstances de sa mort. Lors de cette soirée n'ont été invités que des gens triés sur le volet :</text:p>
      <text:p text:style-name="P2"/>
      <text:list text:style-name="L1">
        <text:list-item>
          <text:p text:style-name="P3">Amanda Red : Experte comptable de Lord Bertham et sceptique notoire.</text:p>
        </text:list-item>
        <text:list-item>
          <text:p text:style-name="P3">Le Dr Derelict : Médecin qui accompagnait Lord Bertham et inventeur à ses heures perdues.</text:p>
        </text:list-item>
        <text:list-item>
          <text:p text:style-name="P3">John Bertham : Fils cadet de Lord Bertham, viveur et amateur de théâtre.</text:p>
        </text:list-item>
        <text:list-item>
          <text:p text:style-name="P3">Gabriel Bertham : Fils ainé de Lord Bertham et médecin.</text:p>
        </text:list-item>
        <text:list-item>
          <text:p text:style-name="P3">Patience Bertham : Fille de Lord Bertham qui termine ses études de juriste.</text:p>
        </text:list-item>
        <text:list-item>
          <text:p text:style-name="P3">Tybalt LeFol : Grand ami de Lord Bertham et adepte des arts obscurs.</text:p>
        </text:list-item>
        <text:list-item>
          <text:p text:style-name="P3"><text:soft-page-break/>Luca Mason : livreur Amazon qui passait par là et a fini avec une coupe de champagne à la main.</text:p>
        </text:list-item>
      </text:list>
      <text:p text:style-name="P2"/>
      <text:p text:style-name="P2">Et les membres du personnel :</text:p>
      <text:p text:style-name="P2"/>
      <text:list text:style-name="L2">
        <text:list-item>
          <text:p text:style-name="P4">Archie Butler : Chef du personnel dirigeant la maison d'une main de fer.</text:p>
        </text:list-item>
        <text:list-item>
          <text:p text:style-name="P4">Bobby Watson : Homme à tout faire de la maison.</text:p>
        </text:list-item>
      </text:list>
      <text:h text:style-name="P5" text:outline-level="1">Wow ! et moi dans tout ça ?</text:h>
      <text:p text:style-name="P2"/>
      <text:p text:style-name="P2"><text:tab/>Dans cette murder party, vous allez incarner l'un des personnages présent<text:span text:style-name="T3">s</text:span> à la soirée. Dans votre fiche de personnage seront présentés succintement les informations suivantes :</text:p>
      <text:p text:style-name="P2"/>
      <text:list text:style-name="L3">
        <text:list-item>
          <text:p text:style-name="P6">Qui vous êtes.</text:p>
        </text:list-item>
        <text:list-item>
          <text:p text:style-name="P6">Si vous avez tué quelqu'un.</text:p>
        </text:list-item>
        <text:list-item>
          <text:p text:style-name="P6">Quel a été votre emploi du temps lors de <text:span text:style-name="T4">la</text:span> soirée et cinq ans plus tôt lors de la mort de Lord Bertham.</text:p>
        </text:list-item>
        <text:list-item>
          <text:p text:style-name="P6">Vos objectifs et les informations que vous voulez dissimuler.</text:p>
        </text:list-item>
      </text:list>
      <text:p text:style-name="P2"/>
      <text:p text:style-name="P2"><text:tab/>En discutant avec les autres joueurs et avec les organisateurs de la murder party, vous allez pouvoir découvrir ce qui s'est passé lors de la soirée et ainsi résoudre le mystère de la mort de Lord BumbleTwit mais faites attention : il y a un meurtrier parmi vous !</text:p>
      <text:p text:style-name="P2"/>
      <text:p text:style-name="P2"><text:tab/>Les informations que vous avez sur votre fiche de personnage sont censées donner quelques des éléments sur le personnage que vous allez incarner mais elles n'indiquent pas vraiment qui vous êtes. N'hésitez pas à rajouter de la richesse à votre personnage <text:span text:style-name="T5">en inventant une vie à votre personnage en dehors des tristes événements qui vous rassemblent </text:span><text:span text:style-name="T6">ce soir. </text:span>Si une information n'est pas spécifiée dans votre fiche de personnage, vous pouvez à priori la remplir.</text:p>
      <text:p text:style-name="P2"/>
      <text:h text:style-name="P5" text:outline-level="1">Règles de sécurité</text:h>
      <text:p text:style-name="P2"/>
      <text:p text:style-name="P2"><text:tab/>Certains des personnages présentés par les fiches de personnages possèdent des intentions douteuses voire criminelles à la manière d'un roman policier. Autant que possible, faites attention aux autres joueurs en incarnant vos personnages. Ce n'est pas parce qu'un propos est dit par un personnage fictif qu'il ne fait pas de mal.</text:p>
      <text:p text:style-name="P2"/>
      <text:p text:style-name="P2">Le jour J, les organisateurs présenteront des règles de sécurité qu'il faudra suivre.</text:p>
      <text:h text:style-name="P7" text:outline-level="1">Votre personnage : <text:span text:style-name="T7">Archie Butler</text:span></text:h>
      <text:p text:style-name="P8"/>
      <text:p text:style-name="P9">Avez-vous tué quelqu'un ?</text:p>
      <text:p text:style-name="P8"/>
      <text:p text:style-name="P8">Non.</text:p>
      <text:p text:style-name="P8"/>
      <text:p text:style-name="P9">Qui êtes-vous ?</text:p>
      <text:p text:style-name="P8"/>
      <text:p text:style-name="P8"><text:tab/>Chef majordome de Lord BumbleTwit et escroc de la petite semaine. Votre position en tant que majordome du grand medium vous vaut un certain renom en ville qui n'est pas pour vous déplaire. Vous êtes un fervent défenseur du capitalisme que vous servez conscienscieusement au quotidien.</text:p>
      <text:p text:style-name="P8"/>
      <text:h text:style-name="P5" text:outline-level="1">Votre emploi du temps</text:h>
      <text:p text:style-name="P8"/>
      <text:p text:style-name="P9">### Il y a 5 ans - Lord Bertham</text:p>
      <text:p text:style-name="P8"/>
      <text:p text:style-name="P8"><text:tab/>Cela faisait deux mois que Lord BumbleTwit s'était installé <text:span text:style-name="T8">au manoir Bertham </text:span>quand la mort de Lord Bertham arriva. La journée avait bien eu quelques détails surprenant<text:span text:style-name="T9">s</text:span> mais rien qui n'annonçait les événements : le docteur Derelict s'était présenté à l'improviste au manoir. Il disait avoir quelque chose d'important à voir avec Lord BumbleTwit. Vous avez entendu John Bertham (le fils cadet de Lord Bertham) se disputer violemment à l'étage avec son père. Carl Bluefinch (le domestique de Lord Bertham) avait disparu en vous laissant tout le travail. Vous avez aussi surpris Patience Bertham en train de pleurer dans le jardin et finalement Lord Bertham a été retrouvé mort. <text:span text:style-name="T10">Chienne de vie.</text:span></text:p>
      <text:p text:style-name="P8"/>
      <text:p text:style-name="P8"><text:tab/>Lord BumbleTwit a <text:span text:style-name="T11">ensuite </text:span><text:span text:style-name="T12">r</text:span>acheté le manoir des Bertham. Il a le sens des affaires ce vieux renard. Vous êtes assez admiratif : comme un meurtre avait été commis sur place, il avait réussi à faire baisser le prix. Arguant des angoisses liés aux événements qui ont eu lieu, vous avez réussi à obtenir quelques jours de congés payés.</text:p>
      <text:p text:style-name="P8"/>
      <text:p text:style-name="P9">### Quelques jours avant la réception</text:p>
      <text:p text:style-name="P8"/>
      <text:p text:style-name="P8"><text:tab/>Cela fait maintenant quelques années que vous parvenez à escroquez un peu d'argent à Lord BumbleTwit en mettant des dépenses personnelles sur les comptes de la maison. Vous avez aussi trouv<text:span text:style-name="T13">é</text:span> manière de faire livrer des paquets pour Lord BumbleTwit et de les intercepter. Cependant, cette fois-ci il vous fallait beaucoup d'argent pour régler des dettes de jeu. Vous avez repensé à l'affaire Bertham. Parmi les gens susceptibles d'avoir de l'argent et des choses à cacher, vous avez pensé aux enfants Bertham :</text:p>
      <text:p text:style-name="P8"/>
      <text:list text:style-name="L4">
        <text:list-item>
          <text:p text:style-name="P10">Patience Bertham n'avait que 15 ans à l'époque, sans doute pas.</text:p>
        </text:list-item>
        <text:list-item>
          <text:p text:style-name="P10">Gabriel Bertham peut-être.</text:p>
        </text:list-item>
        <text:list-item>
          <text:p text:style-name="P10">John Bertham assurément ! Il cherche les ennuis !</text:p>
        </text:list-item>
      </text:list>
      <text:p text:style-name="P8"/>
      <text:p text:style-name="P8"><text:tab/>Lord BumbleTwit remplissant aussi les critères <text:span text:style-name="T14">de « personne avec sans doute des choses à cacher »</text:span>, vous avez décidé d'envoyer à Gabriel Bertham, John Bertham et Lord BumbleTwit la note suivante : "Je sais ce que vous avez fait il y a cinq ans. Si vous ne voulez pas que vos secrets <text:soft-page-break/>s'ébruitent, il va falloir payer. Envoyez dix-mille livres à l'adresse suivante : XXX." avec trois adresses différentes. Il s'agissait d'un gros bluffs mais cela a fonctionné ! Vous avez reçu dix-mille livres de Gabriel Bertham !</text:p>
      <text:p text:style-name="P8"/>
      <text:p text:style-name="P8"><text:tab/>Et maintenant Lord BumbleTwit qui organise une soirée pour parler avec Lord Bertham. Il y aura assurément matière à organiser quelque petit chantage grâce à cela !</text:p>
      <text:p text:style-name="P8"/>
      <text:p text:style-name="P9">### Lord BumbleTwit</text:p>
      <text:p text:style-name="P8"/>
      <text:p text:style-name="P11"><text:tab/>Ce fut une journée fort déplaisante. Après déjeuner, Lord BumbleTwit a été d'une humeur massacrante, parlant de traitres et le regard rempli d'une rage difficilement contenue. Parlait-il de vous ? Il faut dire que ces derniers temps, vous avez été de moins en moins prudent. Il a sans doute dû découvrir les sommes faibles mais de plus en plus nombreuses qui s'échappaient de son compte pour terminer dans votre poche.</text:p>
      <text:p text:style-name="P11"/>
      <text:p text:style-name="P11"><text:tab/>Vers 16h30, Lord BumbleTwit s'est absenté pour aller en ville, vous laissant vous et Bobby Watson pour préparer la soirée. Bobby devait notamment s'occuper du repas, le chef désigné pour la soirée ayant fait faux bond. Pendant cette phase de préparation, il ne s'est pas passé grand-chose. Le docteur Derelict est arrivé en disant qu'il avait une affaire importante à régler et il a disparu comme à son habitude. <text:span text:style-name="T15">Sans doute pour se saouler. </text:span><text:span text:style-name="T16">Tant qu’il laisse quelques billets pour vous, vous ne le</text:span><text:span text:style-name="T15"> cafte</text:span><text:span text:style-name="T16">z pas au big boss</text:span><text:span text:style-name="T15">.</text:span></text:p>
      <text:p text:style-name="P11"/>
      <text:p text:style-name="P11"><text:tab/>Etant parvenu à accomplir vos tâches sans trop vous fouler et Lord BumbleTwit n'étant toujours pas revenu de son rendez-vous, vous avez eu l'idée de fouiller dans ses papiers pour voir s'il commençait à avoir des soupçons sur vos menus larcins. Trop occupé à regarder les en-têtes des papiers, vous n'avez pas remarqué qu'Amanda Red - le premier rendez-vous de la soirée Lord BumbleTwit - était arrivée. Vous avez dû bafouill<text:span text:style-name="T17">er</text:span> une excuses en sortant du bureau mais vous n'en êtes pas bien sûr. Quel idiot ! C'est un coup à se faire prendre ! Fort heureusement, Lord BumbleTwit est revenu de son rendez-vous en ville vers à ce moment là et l'attention a été détourné<text:span text:style-name="T18">e</text:span> de vous.</text:p>
      <text:p text:style-name="P11"/>
      <text:p text:style-name="P11"><text:tab/>Les Bertham sont arrivés vers ce moment là et vous avez conduit Gabriel Bertham au bureau de Lord BumbleTwit vers 18h30 pour son rendez-vous. Au moment de partir, Lord BumbleTwit vous a retenu pour vous demander de faire monter Bobby Watson à 19h. Il avait une affaire de la plus haute importance à discuter avec lui. Voila qui est assez intéressant... Et si Lord BumbleTwit soupçonnait Bobby Watson des vols que vous auriez fait sur les compte de la maison ? Une carte intéressante à jouer pendant la soirée...</text:p>
      <text:p text:style-name="P11"/>
      <text:p text:style-name="P11"><text:tab/>Vous avez trouvé Bobby Watson très appliqué à surveiller le four. Il a semblé embêté quand vous lui avez ordonné de monter parler à Lord BumbleTwit et vous a enjoint à surveiller le four. Comme si le poisson allait s'enfuir ! Pas votre affaire.</text:p>
      <text:p text:style-name="P11"/>
      <text:p text:style-name="P11">Le diner <text:span text:style-name="T19">fut </text:span>sans événements particuliers <text:span text:style-name="T19">et vous n’avez pas assisté à la séance de spiritisme</text:span>. En tant que majordome, vous étiez trop occupé à servir les invités et à refourguer à Bobby le boulot embêtant pour prêter attention à ce qui se passait. Vers 22h30, Lord BumbleTwit a tiré le cordon pour appeler un domestique et vous êtes allé voir de quoi il s'agissait. Vous avez trouvé la porte fermée et depuis depuis l'intérieur de la pièce, Lord BumbleTwit vous a dit que c'était une erreur.</text:p>
      <text:p text:style-name="P11"/>
      <text:p text:style-name="P11">Une heure plus tard, Bobby Watson débarquait dans le salon en criant qu'on avait poignardé Lord BumbleTwit. <text:span text:style-name="T20">Chienne de vie.</text:span></text:p>
      <text:p text:style-name="P8"><text:soft-page-break/></text:p>
      <text:h text:style-name="Heading_20_1" text:outline-level="1">Informations que vous voulez garder secrètes</text:h>
      <text:p text:style-name="P8"/>
      <text:p text:style-name="P8"><text:tab/>Il y a plusieurs informations que vous préféreriez dissimuler. Vous ne pouvez pas révéler ces informations de vous-mêmes. Si un autre joueur vous pose des questions sur ces sujets, évitez les questions, échappez vous ou indignez-vous. Si un autre joueur vous présente l'information (il a découvert le peau aux roses), vous pouvez reconnaitre les faits mais que à ce joueur.</text:p>
      <text:p text:style-name="P8"/>
      <text:p text:style-name="P8">- Vous falsifiez la signature de Lord BumbleTwit pour signer des chèques et financer votre train de vie luxueux. Vous l'escroquez.</text:p>
      <text:p text:style-name="P8"/>
      <text:h text:style-name="Heading_20_1" text:outline-level="1">Objectifs</text:h>
      <text:p text:style-name="P8"/>
      <text:p text:style-name="P8">- Ralez pendant cinq bonnes minutes sur les méfaits du communisme et comment le capitalisme est le système le plus équitable et le mieux pensé de l'humanité.</text:p>
      <text:p text:style-name="P8">- Trouvez une manière de garantir votre avenir financier.</text:p>
      <text:p text:style-name="P8">- Trouvez les secrets de tous les autres personnages pour les faire chanter.</text:p>
      <text:p text:style-name="P8"/>
      <text:h text:style-name="Heading_20_1" text:outline-level="1">Conseils de jeux</text:h>
      <text:p text:style-name="P8"/>
      <text:list text:style-name="L5">
        <text:list-item>
          <text:p text:style-name="P12">Votre personnage est un fouineur rusé <text:span text:style-name="T21">et ambitieux</text:span>. N'hésitez pas à adopter une personnalité qui reflète cela.</text:p>
        </text:list-item>
        <text:list-item>
          <text:p text:style-name="P12">Amusez-vous bi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2T23:42:34.162208440</meta:creation-date>
    <dc:date>2026-07-13T00:22:03.577421005</dc:date>
    <meta:editing-duration>PT30M7S</meta:editing-duration>
    <meta:editing-cycles>124</meta:editing-cycles>
    <meta:generator>LibreOffice/26.2.4.2$Linux_X86_64 LibreOffice_project/620$Build-2</meta:generator>
    <meta:document-statistic meta:table-count="0" meta:image-count="0" meta:object-count="0" meta:page-count="5" meta:paragraph-count="67" meta:word-count="1900" meta:character-count="11172" meta:non-whitespace-character-count="9335"/>
  </office:meta>
</office:document-meta>
</file>