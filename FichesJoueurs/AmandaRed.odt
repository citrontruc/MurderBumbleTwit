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1">
      <style:paragraph-properties fo:text-align="justify" style:justify-single-word="false"/>
      <style:text-properties fo:language="fr" fo:country="FR"/>
    </style:style>
    <style:style style:name="P4" style:family="paragraph" style:parent-style-name="Standard" style:list-style-name="L2">
      <style:paragraph-properties fo:text-align="justify"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Standard" style:list-style-name="L3">
      <style:paragraph-properties fo:text-align="justify" style:justify-single-wor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Standard">
      <style:paragraph-properties fo:text-align="justify" style:justify-single-word="false"/>
      <style:text-properties fo:language="fr" fo:country="FR" officeooo:rsid="00436fa6" officeooo:paragraph-rsid="00436fa6"/>
    </style:style>
    <style:style style:name="P9" style:family="paragraph" style:parent-style-name="Standard">
      <style:paragraph-properties fo:text-align="justify" style:justify-single-word="false"/>
      <style:text-properties fo:language="fr" fo:country="FR" fo:font-weight="bold" officeooo:rsid="00436fa6" officeooo:paragraph-rsid="00436fa6" style:font-weight-asian="bold" style:font-weight-complex="bold"/>
    </style:style>
    <style:style style:name="P10" style:family="paragraph" style:parent-style-name="Standard">
      <style:paragraph-properties fo:text-align="justify" style:justify-single-word="false"/>
      <style:text-properties fo:language="fr" fo:country="FR" officeooo:rsid="00436fa6" officeooo:paragraph-rsid="0054ac25"/>
    </style:style>
    <style:style style:name="P11" style:family="paragraph" style:parent-style-name="Standard">
      <style:paragraph-properties fo:text-align="justify" style:justify-single-word="false"/>
      <style:text-properties fo:language="fr" fo:country="FR" officeooo:rsid="00436fa6" officeooo:paragraph-rsid="0067ae76"/>
    </style:style>
    <style:style style:name="P12" style:family="paragraph" style:parent-style-name="Standard" style:list-style-name="L4">
      <style:paragraph-properties fo:text-align="justify" style:justify-single-word="false"/>
      <style:text-properties fo:language="fr" fo:country="FR" officeooo:rsid="00436fa6" officeooo:paragraph-rsid="00436fa6"/>
    </style:style>
    <style:style style:name="T1" style:family="text">
      <style:text-properties officeooo:rsid="001e1d0c"/>
    </style:style>
    <style:style style:name="T2" style:family="text">
      <style:text-properties officeooo:rsid="002128cd"/>
    </style:style>
    <style:style style:name="T3" style:family="text">
      <style:text-properties officeooo:rsid="002cf8e7"/>
    </style:style>
    <style:style style:name="T4" style:family="text">
      <style:text-properties officeooo:rsid="002e5cbb"/>
    </style:style>
    <style:style style:name="T5" style:family="text">
      <style:text-properties officeooo:rsid="00377d2f"/>
    </style:style>
    <style:style style:name="T6" style:family="text">
      <style:text-properties officeooo:rsid="00393aca"/>
    </style:style>
    <style:style style:name="T7" style:family="text">
      <style:text-properties officeooo:rsid="0044088d"/>
    </style:style>
    <style:style style:name="T8" style:family="text">
      <style:text-properties fo:font-weight="bold" style:font-weight-asian="bold" style:font-weight-complex="bold"/>
    </style:style>
    <style:style style:name="T9" style:family="text">
      <style:text-properties officeooo:rsid="004f155a"/>
    </style:style>
    <style:style style:name="T10" style:family="text">
      <style:text-properties officeooo:rsid="004fd719"/>
    </style:style>
    <style:style style:name="T11" style:family="text">
      <style:text-properties officeooo:rsid="0052e736"/>
    </style:style>
    <style:style style:name="T12" style:family="text">
      <style:text-properties officeooo:rsid="0057dc9e"/>
    </style:style>
    <style:style style:name="T13" style:family="text">
      <style:text-properties officeooo:rsid="0059ae2b"/>
    </style:style>
    <style:style style:name="T14" style:family="text">
      <style:text-properties officeooo:rsid="005a5988"/>
    </style:style>
    <style:style style:name="T15" style:family="text">
      <style:text-properties officeooo:rsid="00611e13"/>
    </style:style>
    <style:style style:name="T16" style:family="text">
      <style:text-properties officeooo:rsid="0065a5e5"/>
    </style:style>
    <style:style style:name="T17" style:family="text">
      <style:text-properties officeooo:rsid="00690ee1"/>
    </style:style>
    <style:style style:name="T18" style:family="text">
      <style:text-properties officeooo:rsid="0069faba"/>
    </style:style>
    <style:style style:name="T19" style:family="text">
      <style:text-properties officeooo:rsid="006d2a67"/>
    </style:style>
    <style:style style:name="T20" style:family="text">
      <style:text-properties officeooo:rsid="006ff426"/>
    </style:style>
    <style:style style:name="T21" style:family="text">
      <style:text-properties officeooo:rsid="0070ab77"/>
    </style:style>
    <style:style style:name="T22" style:family="text">
      <style:text-properties officeooo:rsid="0072a534"/>
    </style:style>
    <style:style style:name="T23" style:family="text">
      <style:text-properties officeooo:rsid="0072ba7d"/>
    </style:style>
    <style:style style:name="T24" style:family="text">
      <style:text-properties officeooo:rsid="0079cf81"/>
    </style:style>
    <style:style style:name="T25" style:family="text">
      <style:text-properties officeooo:rsid="007c9b8a"/>
    </style:style>
    <style:style style:name="T26" style:family="text">
      <style:text-properties officeooo:rsid="007e57e4"/>
    </style:style>
    <style:style style:name="T27" style:family="text">
      <style:text-properties officeooo:rsid="007fd1bd"/>
    </style:style>
    <style:style style:name="T28" style:family="text">
      <style:text-properties officeooo:rsid="0085e1b4"/>
    </style:style>
    <style:style style:name="T29" style:family="text">
      <style:text-properties officeooo:rsid="0087cb1b"/>
    </style:style>
    <style:style style:name="T30" style:family="text">
      <style:text-properties officeooo:rsid="00892fd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text:span>Invitation</text:h>
      <text:p text:style-name="P2"/>
      <text:p text:style-name="P2">Cher ami,</text:p>
      <text:p text:style-name="P2"/>
      <text:p text:style-name="P2"><text:tab/>Par la présente, vous êtes convié par Lord BumbleTwit à une séance de spiritisme dans sa résidence d’été.</text:p>
      <text:p text:style-name="P2"><text:tab/>Dans la cité où le labyrinthe guide les pénitents, les vitraux laissent des traces sanglantes sur la pierre et certaines dettes semblent survivre à la mort elle-même.</text:p>
      <text:p text:style-name="P2"><text:tab/>Lorsque l’odeur de la poudre à canon se sera enfin dissipée des rues et que les derniers échos de la Marseillaise auront cessé de troubler la nuit, nous tenterons d’entrer en communion avec l’âme de notre regretté ami Lord Bertham, assassiné il y a maintenant cinq ans.</text:p>
      <text:p text:style-name="P2"/>
      <text:p text:style-name="P2">Âmes sensibles, vous ne l’emporterez pas au paradis.</text:p>
      <text:p text:style-name="P2">Très cordialement,</text:p>
      <text:p text:style-name="P2"/>
      <text:p text:style-name="P2">Lord BumbleTwit</text:p>
      <text:p text:style-name="P2"/>
      <text:h text:style-name="P1" text:outline-level="1">La murder party</text:h>
      <text:p text:style-name="P2"/>
      <text:p text:style-name="P2"><text:tab/>Lord BumbleTwit a toujours été un curieux personnage. Révéré comme haï, ce gentleman ne laisse pas indifférent. Medium reconnu, il est parvenu à construire sa fortune grâce à ses fameuses "séances" avec lesquels il dialogue avec les défunts. Ces événements à huis-clos lui ont toujours permis d'attirer un publique hétéroclite constitué de jeunes gens avides de frissons, de vieillards en deuil et d'artistes curieux. Et bien entendu de généreux mécènes.</text:p>
      <text:p text:style-name="P2"/>
      <text:p text:style-name="P2"><text:tab/>Parmi les mécènes de Lord BumbleTwit, se trouvait Lord Bertham. Financier veuf, misanthrope et acariatre, Lord Bertham a fait don de sommes colossales à Lord BumbleTwit pendant les trois mois où celui-ci est demeuré chez lui. Pendant cette période, le médium utilisait ses talents afin de dialoguer avec l'esprit de Lady Bertham et de l'opinion de tous, cela avait permis à Lord Bertham de trouver une forme de paix. Malheureusement, celle-ci fut de courte durée car Lord Bertham finit assassiné dans bureau dans des circonstances suspectes. <text:span text:style-name="T2">L’affaire n’a jamais été élucidée.</text:span></text:p>
      <text:p text:style-name="P2"/>
      <text:p text:style-name="P2"><text:tab/>Nous nous trouvons cinq ans plus tard. Lord BumbleTwit a depuis racheté le manoir de Bertham. Vous pensiez que l'affaire de la mort de Lord Bertham était derrière vous quand Lord BumbleTwit vous a invité à une séance très particulière pendant laquelle l'esprit de Lord Bertham sera invoqué afin de l'interroger sur les circonstances de sa mort. Lors de cette soirée n'ont été invités que des gens triés sur le volet :</text:p>
      <text:p text:style-name="P2"/>
      <text:list text:style-name="L1">
        <text:list-item>
          <text:p text:style-name="P3">Amanda Red : Experte comptable de Lord Bertham et sceptique notoire.</text:p>
        </text:list-item>
        <text:list-item>
          <text:p text:style-name="P3">Le Dr Derelict : Médecin qui accompagnait Lord Bertham et inventeur à ses heures perdues.</text:p>
        </text:list-item>
        <text:list-item>
          <text:p text:style-name="P3">John Bertham : Fils cadet de Lord Bertham, viveur et amateur de théâtre.</text:p>
        </text:list-item>
        <text:list-item>
          <text:p text:style-name="P3">Gabriel Bertham : Fils ainé de Lord Bertham et médecin.</text:p>
        </text:list-item>
        <text:list-item>
          <text:p text:style-name="P3">Patience Bertham : Fille de Lord Bertham qui termine ses études de juriste.</text:p>
        </text:list-item>
        <text:list-item>
          <text:p text:style-name="P3">Tybalt LeFol : Grand ami de Lord Bertham et adepte des arts obscurs.</text:p>
        </text:list-item>
        <text:list-item>
          <text:p text:style-name="P3"><text:soft-page-break/>Luca Mason : livreur Amazon qui passait par là et a fini avec une coupe de champagne à la main.</text:p>
        </text:list-item>
      </text:list>
      <text:p text:style-name="P2"/>
      <text:p text:style-name="P2">Et les membres du personnel :</text:p>
      <text:p text:style-name="P2"/>
      <text:list text:style-name="L2">
        <text:list-item>
          <text:p text:style-name="P4">Archie Butler : Chef du personnel dirigeant la maison d'une main de fer.</text:p>
        </text:list-item>
        <text:list-item>
          <text:p text:style-name="P4">Bobby Watson : Homme à tout faire de la maison.</text:p>
        </text:list-item>
      </text:list>
      <text:h text:style-name="P5" text:outline-level="1">Wow ! et moi dans tout ça ?</text:h>
      <text:p text:style-name="P2"/>
      <text:p text:style-name="P2"><text:tab/>Dans cette murder party, vous allez incarner l'un des personnages présent<text:span text:style-name="T3">s</text:span> à la soirée. Dans votre fiche de personnage seront présentés succintement les informations suivantes :</text:p>
      <text:p text:style-name="P2"/>
      <text:list text:style-name="L3">
        <text:list-item>
          <text:p text:style-name="P6">Qui vous êtes.</text:p>
        </text:list-item>
        <text:list-item>
          <text:p text:style-name="P6">Si vous avez tué quelqu'un.</text:p>
        </text:list-item>
        <text:list-item>
          <text:p text:style-name="P6">Quel a été votre emploi du temps lors de <text:span text:style-name="T4">la</text:span> soirée et cinq ans plus tôt lors de la mort de Lord Bertham.</text:p>
        </text:list-item>
        <text:list-item>
          <text:p text:style-name="P6">Vos objectifs et les informations que vous voulez dissimuler.</text:p>
        </text:list-item>
      </text:list>
      <text:p text:style-name="P2"/>
      <text:p text:style-name="P2"><text:tab/>En discutant avec les autres joueurs et avec les organisateurs de la murder party, vous allez pouvoir découvrir ce qui s'est passé lors de la soirée et ainsi résoudre le mystère de la mort de Lord BumbleTwit mais faites attention : il y a un meurtrier parmi vous !</text:p>
      <text:p text:style-name="P2"/>
      <text:p text:style-name="P2"><text:tab/>Les informations que vous avez sur votre fiche de personnage sont censées donner quelques des éléments sur le personnage que vous allez incarner mais elles n'indiquent pas vraiment qui vous êtes. N'hésitez pas à rajouter de la richesse à votre personnage <text:span text:style-name="T5">en inventant une vie à votre personnage en dehors des tristes événements qui vous rassemblent </text:span><text:span text:style-name="T6">ce soir. </text:span>Si une information n'est pas spécifiée dans votre fiche de personnage, vous pouvez à priori la remplir.</text:p>
      <text:p text:style-name="P2"/>
      <text:h text:style-name="P5" text:outline-level="1">Règles de sécurité</text:h>
      <text:p text:style-name="P2"/>
      <text:p text:style-name="P2"><text:tab/>Certains des personnages présentés par les fiches de personnages possèdent des intentions douteuses voire criminelles à la manière d'un roman policier. Autant que possible, faites attention aux autres joueurs en incarnant vos personnages. Ce n'est pas parce qu'un propos est dit par un personnage fictif qu'il ne fait pas de mal.</text:p>
      <text:p text:style-name="P2"/>
      <text:p text:style-name="P2">Le jour J, les organisateurs présenteront des règles de sécurité qu'il faudra suivre.</text:p>
      <text:h text:style-name="P7" text:outline-level="1">Votre personnage : <text:span text:style-name="T7">Amanda Red</text:span></text:h>
      <text:p text:style-name="P8"/>
      <text:p text:style-name="P9">Avez-vous tué quelqu'un ?</text:p>
      <text:p text:style-name="P8"/>
      <text:p text:style-name="P8">Non.</text:p>
      <text:p text:style-name="P8"/>
      <text:p text:style-name="P9">Qui êtes-vous ?</text:p>
      <text:p text:style-name="P8"/>
      <text:p text:style-name="P8"><text:tab/>Experte comptable sagace et pragmatique, vous croyez dur comme fer en la supériorité de la raison sur les croyances. Vous travailliez en tant que conseillère financière de Lord Bertham.</text:p>
      <text:p text:style-name="P8"/>
      <text:h text:style-name="P5" text:outline-level="1">Votre emploi du temps</text:h>
      <text:p text:style-name="P8"/>
      <text:p text:style-name="P8">**<text:span text:style-name="T8">IMPORTANT</text:span>** : Vous fumez et vous êtes allergique au poivre.</text:p>
      <text:p text:style-name="P8"/>
      <text:p text:style-name="P9">### Il y a 5 ans - Lord Bertham</text:p>
      <text:p text:style-name="P8"/>
      <text:p text:style-name="P8"><text:tab/>Sacré diable de BumbleTwit. Vous détestez le fait que le bougre pourrait vous être utile. Si vous ne doutez pas un seul instant que son numéro de médium n'est qu'un grossier strat<text:span text:style-name="T9">a</text:span>gème pour extorquer de l'argent aux âmes crédules, vous ne pouvez pas nier que depuis que Lord Bertham fréquente ce charlatan, son humeur s'est beaucoup améliorée. Lord Bertham ne réprimande plus ses enfants et il a commencé à se réintéresser à ses affaires ! <text:span text:style-name="T10">Quelle misère ! Devoir quelque chose à cet arnaqueur !</text:span></text:p>
      <text:p text:style-name="P8"/>
      <text:p text:style-name="P10"><text:tab/>Quelques jours avant sa mort, Lord Bertham <text:span text:style-name="T11">avait annoncer vouloir</text:span> léguer sa fortune à Lord BumbleTwit. Cependant, il est mort avant d'avoir pu changer le contenu de son testament et sa fortune a finalement été partagée équitablement entre ses trois enfants. C'est sans doute mieux comme cela. <text:span text:style-name="T12">Vous n’étiez pas au domaine lord du jour du meurtre et ne pouvez rien ajouter de plus malheureusement.</text:span></text:p>
      <text:p text:style-name="P8"/>
      <text:p text:style-name="P8"><text:tab/>Sur le souhait des enfants Bertham, vous avez mis la maison à vendre. Trouver un propriétaire ne s'est pas avéré aisé, personne ne souhaite vivre dans une maison avec une histoire aussi morbide. La mélancolie de Lord Bertham lors des dernières années de sa vie n'a pas aidé et le lieu était rempli de vieilleries : la salle de musique avait des instruments desaccordés, la chambre de feu Lady Bertham avait été condamnée et remplie de poussière, sur le bureau de Lord Bertham se trouvait même une horl<text:span text:style-name="T13">o</text:span>ge de table cassée. Vous vous êtes empressé de faire enlever certaines de ces pièces pour ne pas effrayer les acheteurs. Après un mois de recherches <text:span text:style-name="T14">infructueuses</text:span>, Lord BumbleTwit s'est porté acheteur.</text:p>
      <text:p text:style-name="P8"/>
      <text:p text:style-name="P9">### Lord BumbleTwit</text:p>
      <text:p text:style-name="P8"/>
      <text:p text:style-name="P11"><text:tab/>Si vous n'avez rien de personnel contre <text:span text:style-name="T15">le médium</text:span>, vous ne cautionnez pas le charlatanisme et l'arrogance du medium vous a toujours irrité<text:span text:style-name="T16">e</text:span>. Vous savez que ce grigou aime bien avoir l'avantage alors par pur esprit de provocation, <text:span text:style-name="T17">vous êtes arrivée en avance à votre rendez-vous de</text:span> 18h avec Lord BumbleTwit <text:span text:style-name="T18">en espérant le surprendre dans ses préparatifs</text:span>. Comme vous connaissiez les lieux, vous êtes monté<text:span text:style-name="T19">e</text:span> dans son bureau (l'ex bureau de Lord Bertham). Vous y avez alors découvert Archie Butler <text:soft-page-break/>- le chef majordome - en train de fouiller dans ses papiers. En rougissant, il a bafouillé quelque chose sur le fait de chercher des trombones et est parti chercher BumbleTwit. Vous auriez bien aimé savoir ce qu'il cherchait au juste quand <text:span text:style-name="T20">le médium</text:span> est apparu dans l'embrasure de la porte. Sourire au lèvre, élégance anglais impeccable. Le succès d'un bon arnaqueur tient aux apparences dit-on. Sur ce volet, BumbleTwit excelle.</text:p>
      <text:p text:style-name="P8"/>
      <text:p text:style-name="P8"><text:span text:style-name="T21"><text:tab/>Vous avez</text:span> échangé des impolitesses pendant un instant quand un appel téléphonique a interrompu votre conversation. Prenant le combiné, Lord BumbleTwit a écouté un instant avant de rétorquer avec méchanceté :</text:p>
      <text:p text:style-name="P8">- Ne perdez pas votre temps, vous êtes inexcusable. Vous savez que je ne supporte pas les traitres.</text:p>
      <text:p text:style-name="P8">Pour finalement raccrocher. Devant l'air furieux de Lord BumbleTwit, vous avez dévié le sujet de conversation pour parler <text:span text:style-name="T22">de ce</text:span> qui vous amenait réellement : John Bertham voulait faire financer un nouveau spectacle pour son cabaret et avait demandé si vous pouviez l'aider à trouver des partenaires financiers. Vous saviez que Lord BumbleTwit aimait beaucoup les enfants Bertham et vous avez donc pensé qu'il pourrait apporter son soutien <text:span text:style-name="T23">ausssi</text:span>.</text:p>
      <text:p text:style-name="P8"/>
      <text:p text:style-name="P8"><text:tab/>Archie Butler est arrivé à ce moment là de la conversation pour prévenir que Gabriel Bertham était arrivé pour son rendez-vous. Cela vous a surpris, vous ne vous attendiez pas à ce qu'il soit déjà 18h30.</text:p>
      <text:p text:style-name="P8">- On ne voit pas le temps passer. Il faut dire qu'il n'y a pas d'horloge dans cette pièce.</text:p>
      <text:p text:style-name="P8">Lord <text:span text:style-name="T24">BumbleTwit</text:span> s'est contenté de faire son éternel sourire ironique.</text:p>
      <text:p text:style-name="P8"/>
      <text:p text:style-name="P8"><text:tab/>Vous êtes restée dans le salon jusqu'au diner, attendant avec impatience la séance de spiritisme qui devait avoir lieu après. C'est à ce moment-là qu'une difficulté imprévue s'est levée : on vous a servi par accident un plat contenant du poivre. Avec un sourire gêné, vous avez quitté la table en prétextant un coup de téléphone urgent à passer. La vérité est que vous êtes allergique et que vous avez dû vous rendre aux cabinets de toute urgence où vous y êtes resté<text:span text:style-name="T25">e</text:span> pendant... un moment. Toujours est-il que vous avez raté la séance de spiritisme.</text:p>
      <text:p text:style-name="P8"><text:tab/>Coincé dans les sanitaires, écumante de rage, vous avez cependant pu observer depuis la fenêtre Tybalt (un des amis de Lord BumbleTwit) dans le jardin qui semblait contourner la maison avant la séance et vous l'avez observé passer en sens inverse après. <text:span text:style-name="T26">Curieux</text:span></text:p>
      <text:p text:style-name="P8"/>
      <text:p text:style-name="P8"><text:span text:style-name="T27"><text:tab/>Retraçant votre chemin sur le salon, </text:span>vous avez trouvé la malette du docteur Derelict qui trainait et vous avez prélevé quelques médicaments contre les allergies puis vous vous êtes arrêtée au salon pour récupérer de votre crise.</text:p>
      <text:p text:style-name="P8"/>
      <text:p text:style-name="P8"><text:tab/>Deux heures plus tard, Bobby Watson débarquait dans le salon en criant qu'on avait poignardé Lord BumbleTwit.</text:p>
      <text:p text:style-name="P8"/>
      <text:h text:style-name="Heading_20_1" text:outline-level="1">Informations que vous voulez garder secrètes</text:h>
      <text:p text:style-name="P8"/>
      <text:p text:style-name="P8"><text:tab/>Il y a plusieurs informations que vous préféreriez dissimuler. Vous ne pouvez pas révéler ces informations de vous-mêmes. Si un autre joueur vous pose des questions sur ces sujets, évitez les questions, échappez vous ou indignez-vous. Si un autre joueur vous présente l'information (il a découvert le peau aux roses), vous pouvez reconnaitre les faits mais que à ce joueur.</text:p>
      <text:p text:style-name="P8"/>
      <text:p text:style-name="P8"><text:soft-page-break/>- Vous préféreriez ne pas mentionnez que vous étiez enfermé au cabinet pendant la séance de spiritisme. <text:span text:style-name="T28">C’est assez humiliant.</text:span></text:p>
      <text:p text:style-name="P8"/>
      <text:h text:style-name="Heading_20_1" text:outline-level="1">Objectifs</text:h>
      <text:p text:style-name="P8"/>
      <text:p text:style-name="P8">- Trouvez une explication rationnelle à la séance de spiritisme de Lord BumbleTwit.</text:p>
      <text:p text:style-name="P8">- <text:span text:style-name="T29">Evangélisez </text:span><text:span text:style-name="T30">sur les bienfaits de l’éducation et de la science pour lutter contre l’obscurantisme.</text:span></text:p>
      <text:p text:style-name="P8">- Ah oui, résoudre cette histoire de mort de Lord BumbleTwit.</text:p>
      <text:p text:style-name="P8"/>
      <text:h text:style-name="Heading_20_1" text:outline-level="1">Conseils de jeux</text:h>
      <text:p text:style-name="P8"/>
      <text:list text:style-name="L4">
        <text:list-item>
          <text:p text:style-name="P12">Pour des raisons pratiques, vous n'avez pas pu assister à la séance de spiritisme. La première étape sera de comprendre ce qui s'est passé lors de la séance.</text:p>
        </text:list-item>
        <text:list-item>
          <text:p text:style-name="P12">Préparez à l'avance un mensonge pour justifier votre absence à la séance de spiritisme.</text:p>
        </text:list-item>
        <text:list-item>
          <text:p text:style-name="P12">Amusez-vous bi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2T23:42:34.162208440</meta:creation-date>
    <dc:date>2026-07-13T00:05:57.985904423</dc:date>
    <meta:editing-duration>PT22M37S</meta:editing-duration>
    <meta:editing-cycles>89</meta:editing-cycles>
    <meta:generator>LibreOffice/25.8.0.4$Linux_X86_64 LibreOffice_project/48f00303701489684e67c38c28aff00cd5929e67</meta:generator>
    <meta:document-statistic meta:table-count="0" meta:image-count="0" meta:object-count="0" meta:page-count="5" meta:paragraph-count="67" meta:word-count="1786" meta:character-count="10622" meta:non-whitespace-character-count="8897"/>
  </office:meta>
</office:document-meta>
</file>