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67ae76"/>
    </style:style>
    <style:style style:name="P11" style:family="paragraph" style:parent-style-name="Standard">
      <style:text-properties officeooo:rsid="01274e12" officeooo:paragraph-rsid="01274e12"/>
    </style:style>
    <style:style style:name="P12"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10fdf1b"/>
    </style:style>
    <style:style style:name="T8" style:family="text">
      <style:text-properties officeooo:rsid="0111653f"/>
    </style:style>
    <style:style style:name="T9" style:family="text">
      <style:text-properties officeooo:rsid="0116c269"/>
    </style:style>
    <style:style style:name="T10" style:family="text">
      <style:text-properties officeooo:rsid="0124135e"/>
    </style:style>
    <style:style style:name="T11" style:family="text">
      <style:text-properties officeooo:rsid="01247039"/>
    </style:style>
    <style:style style:name="T12" style:family="text">
      <style:text-properties fo:language="fr" fo:country="FR" officeooo:rsid="00436fa6"/>
    </style:style>
    <style:style style:name="T13" style:family="text">
      <style:text-properties fo:language="fr" fo:country="FR" officeooo:rsid="01254f51"/>
    </style:style>
    <style:style style:name="T14" style:family="text">
      <style:text-properties officeooo:rsid="01254f51"/>
    </style:style>
    <style:style style:name="T15" style:family="text">
      <style:text-properties officeooo:rsid="0130f673"/>
    </style:style>
    <style:style style:name="T16" style:family="text">
      <style:text-properties officeooo:rsid="0132cd7b"/>
    </style:style>
    <style:style style:name="T17" style:family="text">
      <style:text-properties officeooo:rsid="0133ca03"/>
    </style:style>
    <style:style style:name="T18" style:family="text">
      <style:text-properties officeooo:rsid="0133d765"/>
    </style:style>
    <style:style style:name="T19" style:family="text">
      <style:text-properties officeooo:rsid="0134834a"/>
    </style:style>
    <style:style style:name="T20" style:family="text">
      <style:text-properties officeooo:rsid="012f9c75"/>
    </style:style>
    <style:style style:name="T21" style:family="text">
      <style:text-properties officeooo:rsid="01370d88"/>
    </style:style>
    <style:style style:name="T22" style:family="text">
      <style:text-properties officeooo:rsid="01386702"/>
    </style:style>
    <style:style style:name="T23" style:family="text">
      <style:text-properties officeooo:rsid="013a1443"/>
    </style:style>
    <style:style style:name="T24" style:family="text">
      <style:text-properties officeooo:rsid="013c32ea"/>
    </style:style>
    <style:style style:name="T25" style:family="text">
      <style:text-properties officeooo:rsid="013c3c3b"/>
    </style:style>
    <style:style style:name="T26" style:family="text">
      <style:text-properties officeooo:rsid="013dc424"/>
    </style:style>
    <style:style style:name="T27" style:family="text">
      <style:text-properties officeooo:rsid="013de366"/>
    </style:style>
    <style:style style:name="T28" style:family="text">
      <style:text-properties officeooo:rsid="012b0b67"/>
    </style:style>
    <style:style style:name="T29" style:family="text">
      <style:text-properties officeooo:rsid="012d7bf4"/>
    </style:style>
    <style:style style:name="T30" style:family="text">
      <style:text-properties officeooo:rsid="013fbc3b"/>
    </style:style>
    <style:style style:name="T31" style:family="text">
      <style:text-properties officeooo:rsid="01426806"/>
    </style:style>
    <style:style style:name="T32" style:family="text">
      <style:text-properties officeooo:rsid="014552ce"/>
    </style:style>
    <style:style style:name="T33" style:family="text">
      <style:text-properties officeooo:rsid="01464bdf"/>
    </style:style>
    <style:style style:name="T34" style:family="text">
      <style:text-properties officeooo:rsid="0147f895"/>
    </style:style>
    <style:style style:name="T35" style:family="text">
      <style:text-properties officeooo:rsid="01497d36"/>
    </style:style>
    <style:style style:name="T36" style:family="text">
      <style:text-properties officeooo:rsid="0150a14d"/>
    </style:style>
    <style:style style:name="T37" style:family="text">
      <style:text-properties officeooo:rsid="01526e96"/>
    </style:style>
    <style:style style:name="T38" style:family="text">
      <style:text-properties officeooo:rsid="0153e01f"/>
    </style:style>
    <style:style style:name="T39" style:family="text">
      <style:text-properties officeooo:rsid="0155120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Luca Mason </text:span><text:span text:style-name="T8">(aka Carl BlueFinch)</text:span></text:h>
      <text:p text:style-name="P8"/>
      <text:p text:style-name="P9">Avez-vous tué quelqu'un ?</text:p>
      <text:p text:style-name="P8"/>
      <text:p text:style-name="P8">Non.</text:p>
      <text:p text:style-name="P8"/>
      <text:p text:style-name="P9">Qui êtes-vous ?</text:p>
      <text:p text:style-name="P8"/>
      <text:p text:style-name="P8"><text:tab/>Votre vrai nom est Carl BlueFinch. Vous étiez le domestique de Lord Bertham. Après la mort de celui-ci, vous n'avez pas pu retrouver un nouvel employeur : les gens se méfient d'une domestique dont le maitre est mort dans des circonstances mystérieuses. Vous avez <text:span text:style-name="T9">alors changé d’identité en adoptant un nouveau nom (Luca Mason) et êtes parvenu</text:span> à retrouver un métier comme livreur Amazon sous-payé. Il faut bien vivre.</text:p>
      <text:p text:style-name="P8"/>
      <text:p text:style-name="P8">Vous avez un faible pour Gabriel Bertham.</text:p>
      <text:h text:style-name="P5" text:outline-level="1">Votre emploi du temps</text:h>
      <text:p text:style-name="P8"/>
      <text:p text:style-name="P9">### Il y a 5 ans - Lord Bertham</text:p>
      <text:p text:style-name="P8"/>
      <text:p text:style-name="P8"><text:tab/>Une catastrophe ne pouvait qu'arriver. Vous l'aviez toujours senti sans savoir qui serait la personne qui la déclencherait. Depuis la mort de Lady Bertham, Lord Bertham est progressivement devenu de plus en plus irascible, négligeant ses enfants quand il ne les réprimendait pas. Le monde s'était arrêté pour lui et il essayait de faire en sorte que cet immobilisme se propage à tout ce qui l'entourait. John était trop bruyant et Lord Bertham ne manquait jamais de lui faire remarquer de la façon la plus cruelle. Gabriel n'avait rien pu faire pour sauver sa mère en dépit de ses études en médecine et son père lui crachait constamment son échec au visage. Patience parvenait à échapper aux colères terribles de Lord Bertham en disparaissant sans prévenir pour réapparaitre dans le jardin.</text:p>
      <text:p text:style-name="P8"/>
      <text:p text:style-name="P8"><text:tab/>La seule personne qui parvenait à calmer Lord Bertham était Lord BumbleTwit : le medium. Dans des séances mystiques, il ramenait des morts Lady Bertham et parvenait ainsi à apaiser le capricieux Lord.</text:p>
      <text:p text:style-name="P8"/>
      <text:p text:style-name="P8"><text:tab/>La situation avait atteint un point d'équilibre précaire qui ne pouvait que se terminer en tragédie. Le jour de la mort de Lord Bertham, vous faisiez le tour de la maison quand vous avez remarqué la porte entrouverte du bureau de Lord Bertham. A l'intérieur du bureau se trouvait Gabriel, une horloge de bureau à la main. Lord Bertham était par terre, mort. D'un geste tremblant, Gabriel vous a tendu l'horloge "Cachez cela ! Débarassez vous-en !" Vous avez toujours eu un faible pour Gabriel et avez donc choisi de l'aider en dépit du bon sens.</text:p>
      <text:p text:style-name="P8"/>
      <text:p text:style-name="P8"><text:tab/>Le reste de la journée est particulièrement flou dans votre tête. Vous vous rappelez avoir jeté l'horloge dans l'étang au fin fond de la propriété. Les interrogatoires n'ont rien donné et la mort de Lord Bertham n'a jamais été officiellement élucidée. La maison a été vendue, la famille Bertham s'est éparpillée et n'avaient donc plus besoin d'un domestique. A vrai dire, vous ne saviez pas très bien quoi penser à l'époque de la situation et vous éloigner de cette tragédie semblait une bonne chose.</text:p>
      <text:p text:style-name="P8"/>
      <text:p text:style-name="P9"><text:soft-page-break/>### Lord BumbleTwit</text:p>
      <text:p text:style-name="P8"/>
      <text:p text:style-name="P10"><text:tab/>Votre patron vous a fait demander tôt le matin. Il parait qu'un riche hurluberlu avait expressement demandé à ce que vous lui livriez son colis. Quand vous avez entendu le nom de Lord BumbleTwit, vous avez pali mais vous n'avez rien dit (chez Amazon, contester un ordre peut vous faire renvoyer). Vous vous êtes présentée au manoir de Lord BumbleTwit vers 1<text:span text:style-name="T10">8</text:span>h<text:span text:style-name="T10">45</text:span> (chez Amazon, être en retard peut vous faire renvoyer) et comme il vous fallait une signature contre remise du colis, vous êtes monté jusqu'à son bureau d'où venaient des éclats de voix.</text:p>
      <text:p text:style-name="P10"/>
      <text:p text:style-name="P10">- <text:span text:style-name="T11">Ce que vous me dites me préoccupe fortement mon ami. Avez-vous payé la rançon ?</text:span></text:p>
      <text:p text:style-name="Standard"><text:span text:style-name="T12">- </text:span><text:span text:style-name="T13">(Bruit de panique) </text:span><text:span text:style-name="T14">Mais bien sûr que non Lord BumbleTwit ! Je n’ai rien fait de tel !</text:span></text:p>
      <text:p text:style-name="P11">- Vraiment ?</text:p>
      <text:p text:style-name="P10"/>
      <text:p text:style-name="P10"><text:tab/>Vous avez essayé de ne pas écouter le reste de la conversation (chez Amazon, en savoir trop peut vous faire renvoyer) et vous vous êtes contenté de frapper à la porte. Lord BumbleTwit est apparu tout sourire, vous a enlevé le paquet que vous apportiez et dans un murmure, il vous a lancé : "je sais qui vous êtes. Je pense que vous avez grand intérêt à rester lors de cette soirée. J'ai prévenu votre employeur de vous laisser la journée. Mon chéquier a su le convaincre." Puis plus fort : "Vous me sauvez la vie mon cher, vous ne savez pas à quel point !".</text:p>
      <text:p text:style-name="P10"/>
      <text:p text:style-name="P10"><text:tab/><text:span text:style-name="T15">Vous avez le droit de rester ? Soit. Avec fatalisme, vous avez gagné le grand salon pour vous servir une coupe de champagne. </text:span><text:span text:style-name="T16">Dans le salon, les convives que vous reconnaissiez pour la plupart discutaient. </text:span><text:span text:style-name="T17">Après des années à essayer de redémarrer votre vie, vous ne saviez pas si vous souhaitiez parler avec eux. </text:span><text:span text:style-name="T18">Mal à votre aise, </text:span><text:span text:style-name="T19">vous avez quitté le salon pour vous rendre </text:span><text:span text:style-name="T20">instinctivement aux cuisines. Domestique un jour, domestique toujours. </text:span><text:span text:style-name="T21">C’est alors que vous vous êtes rendu compte que ce qui était dans le four brulait ! </text:span><text:span text:style-name="T22">Vous avez extirpé une sorte de poisson </text:span><text:span text:style-name="T23">carbonisé </text:span><text:span text:style-name="T24">à l’air peu ragoutant. </text:span><text:span text:style-name="T25">Bobby Watson est alors arrivé en jurant et a repris les choses en main à ce moment en vous remerciant </text:span><text:span text:style-name="T26">à la volée. Cela vous a rendu fier. </text:span><text:span text:style-name="T27">C’est un brave gars ce Bobby Watson.</text:span></text:p>
      <text:p text:style-name="P10"/>
      <text:p text:style-name="P10"><text:tab/><text:span text:style-name="T28">Vous avez </text:span><text:span text:style-name="T29">décidé d’</text:span><text:span text:style-name="T28">asssist</text:span><text:span text:style-name="T29">er</text:span><text:span text:style-name="T28"> à la séance de spiritisme, </text:span><text:span text:style-name="T30">plus par devoir que parce que vous aviez envie. </text:span><text:span text:style-name="T31">Les lumières ont vascillé, des empreintes de mains sont apparues sur les fenêtres. </text:span>C'est alors que vous avez entendu d'une voix gutturale des mots terribles "C'est mon fils qui m'a tué". <text:span text:style-name="T32">L’esprit de Lord Bertham avait parlé.</text:span> <text:span text:style-name="T33">J</text:span>ohn Bertham, tremblant de colère et agonisant d'injures quiconque essayait de lui adresser la parole <text:span text:style-name="T34">est sorti de la pièce suivi de près par un </text:span>Gabriel <text:span text:style-name="T34">livide et </text:span><text:span text:style-name="T35">essayant en vain de le calmer</text:span>.</text:p>
      <text:p text:style-name="P10"/>
      <text:p text:style-name="P10"><text:tab/>Vous ne saviez plus trop où vous mettre. Les deux frères étant le centre d'attention, vous vous êtes soucié de Patience. Où pouvait-elle être ? Elle avait assisté à la séance de spiritisme et devait sans doute être sous le choc des paroles de Lord Bertham. Vous l'avez cherché dans le grand salon, la salle de bal et la salle de spiritisme pour finalement la trouver dehors. Elle semblait tendue et a sursauté quand vous lui avez adressé la parole. Vous avez essayé d'échanger avec elle mais elle ne vous a pas reconnu et s'est donc esquivé rapidement.</text:p>
      <text:p text:style-name="P10"/>
      <text:p text:style-name="P10"><text:tab/>Deux heures plus tard, Bobby Watson débarquait dans le salon en criant qu'on avait poignardé Lord BumbleTwit.</text:p>
      <text:p text:style-name="P8"/>
      <text:h text:style-name="Heading_20_1" text:outline-level="1"><text:soft-page-break/>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A part Lord BumbleTwit <text:span text:style-name="T36">qui </text:span>sait qui sait vous êtes, les autres ignorent votre vraie identité. Vous voulez faire en sorte qu'<text:span text:style-name="T37">autant que possible </text:span>ils continuent de l'ignorer.</text:p>
      <text:p text:style-name="P8"/>
      <text:h text:style-name="Heading_20_1" text:outline-level="1">Objectifs</text:h>
      <text:p text:style-name="P8"/>
      <text:p text:style-name="P8">- Trouvez un nouveau travail pour finalement quitter Amazon.</text:p>
      <text:p text:style-name="P8">- Ne contredites personne au cours de la soirée (chez Amazon, contredire quelqu'un peut vous faire renvoyer).</text:p>
      <text:p text:style-name="P8">- <text:span text:style-name="T38">Trouvez qui a tué Lord BumbleTwit et Lord Bertham.</text:span></text:p>
      <text:p text:style-name="P8"/>
      <text:h text:style-name="Heading_20_1" text:outline-level="1">Conseils de jeux</text:h>
      <text:p text:style-name="P8"/>
      <text:list text:style-name="L4">
        <text:list-item>
          <text:p text:style-name="P12">Votre présence vous rend immédiatement suspect. <text:span text:style-name="T39">Trouvez une excuse pour justifier votre présence et expliquer comment vous connaissez Lord BumbleTwit.</text:span></text:p>
        </text:list-item>
        <text:list-item>
          <text:p text:style-name="P12">- 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58:46.479746188</dc:date>
    <meta:editing-duration>PT1H9M55S</meta:editing-duration>
    <meta:editing-cycles>257</meta:editing-cycles>
    <meta:generator>LibreOffice/26.2.4.2$Linux_X86_64 LibreOffice_project/620$Build-2</meta:generator>
    <meta:document-statistic meta:table-count="0" meta:image-count="0" meta:object-count="0" meta:page-count="5" meta:paragraph-count="65" meta:word-count="1937" meta:character-count="11287" meta:non-whitespace-character-count="9408"/>
  </office:meta>
</office:document-meta>
</file>