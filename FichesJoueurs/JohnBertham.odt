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list-style-name="L1">
      <style:paragraph-properties fo:text-align="justify" style:justify-single-word="false"/>
      <style:text-properties fo:language="fr" fo:country="FR"/>
    </style:style>
    <style:style style:name="P4" style:family="paragraph" style:parent-style-name="Standard" style:list-style-name="L2">
      <style:paragraph-properties fo:text-align="justify" style:justify-single-word="false"/>
      <style:text-properties fo:language="fr" fo:country="FR"/>
    </style:style>
    <style:style style:name="P5" style:family="paragraph" style:parent-style-name="Heading_20_1">
      <style:text-properties fo:language="fr" fo:country="FR"/>
    </style:style>
    <style:style style:name="P6" style:family="paragraph" style:parent-style-name="Standard" style:list-style-name="L3">
      <style:paragraph-properties fo:text-align="justify" style:justify-single-wor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Standard">
      <style:paragraph-properties fo:text-align="justify" style:justify-single-word="false"/>
      <style:text-properties fo:language="fr" fo:country="FR" officeooo:rsid="00436fa6" officeooo:paragraph-rsid="00436fa6"/>
    </style:style>
    <style:style style:name="P9" style:family="paragraph" style:parent-style-name="Standard">
      <style:paragraph-properties fo:text-align="justify" style:justify-single-word="false"/>
      <style:text-properties fo:language="fr" fo:country="FR" fo:font-weight="bold" officeooo:rsid="00436fa6" officeooo:paragraph-rsid="00436fa6" style:font-weight-asian="bold" style:font-weight-complex="bold"/>
    </style:style>
    <style:style style:name="P10" style:family="paragraph" style:parent-style-name="Standard">
      <style:paragraph-properties fo:text-align="justify" style:justify-single-word="false"/>
      <style:text-properties fo:language="fr" fo:country="FR" officeooo:rsid="00436fa6" officeooo:paragraph-rsid="0067ae76"/>
    </style:style>
    <style:style style:name="P11" style:family="paragraph" style:parent-style-name="Standard" style:list-style-name="L4">
      <style:paragraph-properties fo:text-align="justify" style:justify-single-word="false"/>
      <style:text-properties fo:language="fr" fo:country="FR" officeooo:rsid="00436fa6" officeooo:paragraph-rsid="00436fa6"/>
    </style:style>
    <style:style style:name="T1" style:family="text">
      <style:text-properties officeooo:rsid="001e1d0c"/>
    </style:style>
    <style:style style:name="T2" style:family="text">
      <style:text-properties officeooo:rsid="002128cd"/>
    </style:style>
    <style:style style:name="T3" style:family="text">
      <style:text-properties officeooo:rsid="002cf8e7"/>
    </style:style>
    <style:style style:name="T4" style:family="text">
      <style:text-properties officeooo:rsid="002e5cbb"/>
    </style:style>
    <style:style style:name="T5" style:family="text">
      <style:text-properties officeooo:rsid="00377d2f"/>
    </style:style>
    <style:style style:name="T6" style:family="text">
      <style:text-properties officeooo:rsid="00393aca"/>
    </style:style>
    <style:style style:name="T7" style:family="text">
      <style:text-properties officeooo:rsid="00ec19b6"/>
    </style:style>
    <style:style style:name="T8" style:family="text">
      <style:text-properties officeooo:rsid="00c88d58"/>
    </style:style>
    <style:style style:name="T9" style:family="text">
      <style:text-properties officeooo:rsid="00edd87b"/>
    </style:style>
    <style:style style:name="T10" style:family="text">
      <style:text-properties officeooo:rsid="00f7851d"/>
    </style:style>
    <style:style style:name="T11" style:family="text">
      <style:text-properties officeooo:rsid="00f7fc1a"/>
    </style:style>
    <style:style style:name="T12" style:family="text">
      <style:text-properties officeooo:rsid="00faf5e8"/>
    </style:style>
    <style:style style:name="T13" style:family="text">
      <style:text-properties officeooo:rsid="0104b0c2"/>
    </style:style>
    <style:style style:name="T14" style:family="text">
      <style:text-properties officeooo:rsid="01060ab2"/>
    </style:style>
    <style:style style:name="T15" style:family="text">
      <style:text-properties officeooo:rsid="0103fc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text:span>Invitation</text:h>
      <text:p text:style-name="P2"/>
      <text:p text:style-name="P2">Cher ami,</text:p>
      <text:p text:style-name="P2"/>
      <text:p text:style-name="P2"><text:tab/>Par la présente, vous êtes convié par Lord BumbleTwit à une séance de spiritisme dans sa résidence d’été.</text:p>
      <text:p text:style-name="P2"><text:tab/>Dans la cité où le labyrinthe guide les pénitents, les vitraux laissent des traces sanglantes sur la pierre et certaines dettes semblent survivre à la mort elle-même.</text:p>
      <text:p text:style-name="P2"><text:tab/>Lorsque l’odeur de la poudre à canon se sera enfin dissipée des rues et que les derniers échos de la Marseillaise auront cessé de troubler la nuit, nous tenterons d’entrer en communion avec l’âme de notre regretté ami Lord Bertham, assassiné il y a maintenant cinq ans.</text:p>
      <text:p text:style-name="P2"/>
      <text:p text:style-name="P2">Âmes sensibles, vous ne l’emporterez pas au paradis.</text:p>
      <text:p text:style-name="P2">Très cordialement,</text:p>
      <text:p text:style-name="P2"/>
      <text:p text:style-name="P2">Lord BumbleTwit</text:p>
      <text:p text:style-name="P2"/>
      <text:h text:style-name="P1" text:outline-level="1">La murder party</text:h>
      <text:p text:style-name="P2"/>
      <text:p text:style-name="P2"><text:tab/>Lord BumbleTwit a toujours été un curieux personnage. Révéré comme haï, ce gentleman ne laisse pas indifférent. Medium reconnu, il est parvenu à construire sa fortune grâce à ses fameuses "séances" avec lesquels il dialogue avec les défunts. Ces événements à huis-clos lui ont toujours permis d'attirer un publique hétéroclite constitué de jeunes gens avides de frissons, de vieillards en deuil et d'artistes curieux. Et bien entendu de généreux mécènes.</text:p>
      <text:p text:style-name="P2"/>
      <text:p text:style-name="P2"><text:tab/>Parmi les mécènes de Lord BumbleTwit, se trouvait Lord Bertham. Financier veuf, misanthrope et acariatre, Lord Bertham a fait don de sommes colossales à Lord BumbleTwit pendant les trois mois où celui-ci est demeuré chez lui. Pendant cette période, le médium utilisait ses talents afin de dialoguer avec l'esprit de Lady Bertham et de l'opinion de tous, cela avait permis à Lord Bertham de trouver une forme de paix. Malheureusement, celle-ci fut de courte durée car Lord Bertham finit assassiné dans bureau dans des circonstances suspectes. <text:span text:style-name="T2">L’affaire n’a jamais été élucidée.</text:span></text:p>
      <text:p text:style-name="P2"/>
      <text:p text:style-name="P2"><text:tab/>Nous nous trouvons cinq ans plus tard. Lord BumbleTwit a depuis racheté le manoir de Bertham. Vous pensiez que l'affaire de la mort de Lord Bertham était derrière vous quand Lord BumbleTwit vous a invité à une séance très particulière pendant laquelle l'esprit de Lord Bertham sera invoqué afin de l'interroger sur les circonstances de sa mort. Lors de cette soirée n'ont été invités que des gens triés sur le volet :</text:p>
      <text:p text:style-name="P2"/>
      <text:list text:style-name="L1">
        <text:list-item>
          <text:p text:style-name="P3">Amanda Red : Experte comptable de Lord Bertham et sceptique notoire.</text:p>
        </text:list-item>
        <text:list-item>
          <text:p text:style-name="P3">Le Dr Derelict : Médecin qui accompagnait Lord Bertham et inventeur à ses heures perdues.</text:p>
        </text:list-item>
        <text:list-item>
          <text:p text:style-name="P3">John Bertham : Fils cadet de Lord Bertham, viveur et amateur de théâtre.</text:p>
        </text:list-item>
        <text:list-item>
          <text:p text:style-name="P3">Gabriel Bertham : Fils ainé de Lord Bertham et médecin.</text:p>
        </text:list-item>
        <text:list-item>
          <text:p text:style-name="P3">Patience Bertham : Fille de Lord Bertham qui termine ses études de juriste.</text:p>
        </text:list-item>
        <text:list-item>
          <text:p text:style-name="P3">Tybalt LeFol : Grand ami de Lord Bertham et adepte des arts obscurs.</text:p>
        </text:list-item>
        <text:list-item>
          <text:p text:style-name="P3"><text:soft-page-break/>Luca Mason : livreur Amazon qui passait par là et a fini avec une coupe de champagne à la main.</text:p>
        </text:list-item>
      </text:list>
      <text:p text:style-name="P2"/>
      <text:p text:style-name="P2">Et les membres du personnel :</text:p>
      <text:p text:style-name="P2"/>
      <text:list text:style-name="L2">
        <text:list-item>
          <text:p text:style-name="P4">Archie Butler : Chef du personnel dirigeant la maison d'une main de fer.</text:p>
        </text:list-item>
        <text:list-item>
          <text:p text:style-name="P4">Bobby Watson : Homme à tout faire de la maison.</text:p>
        </text:list-item>
      </text:list>
      <text:h text:style-name="P5" text:outline-level="1">Wow ! et moi dans tout ça ?</text:h>
      <text:p text:style-name="P2"/>
      <text:p text:style-name="P2"><text:tab/>Dans cette murder party, vous allez incarner l'un des personnages présent<text:span text:style-name="T3">s</text:span> à la soirée. Dans votre fiche de personnage seront présentés succintement les informations suivantes :</text:p>
      <text:p text:style-name="P2"/>
      <text:list text:style-name="L3">
        <text:list-item>
          <text:p text:style-name="P6">Qui vous êtes.</text:p>
        </text:list-item>
        <text:list-item>
          <text:p text:style-name="P6">Si vous avez tué quelqu'un.</text:p>
        </text:list-item>
        <text:list-item>
          <text:p text:style-name="P6">Quel a été votre emploi du temps lors de <text:span text:style-name="T4">la</text:span> soirée et cinq ans plus tôt lors de la mort de Lord Bertham.</text:p>
        </text:list-item>
        <text:list-item>
          <text:p text:style-name="P6">Vos objectifs et les informations que vous voulez dissimuler.</text:p>
        </text:list-item>
      </text:list>
      <text:p text:style-name="P2"/>
      <text:p text:style-name="P2"><text:tab/>En discutant avec les autres joueurs et avec les organisateurs de la murder party, vous allez pouvoir découvrir ce qui s'est passé lors de la soirée et ainsi résoudre le mystère de la mort de Lord BumbleTwit mais faites attention : il y a un meurtrier parmi vous !</text:p>
      <text:p text:style-name="P2"/>
      <text:p text:style-name="P2"><text:tab/>Les informations que vous avez sur votre fiche de personnage sont censées donner quelques des éléments sur le personnage que vous allez incarner mais elles n'indiquent pas vraiment qui vous êtes. N'hésitez pas à rajouter de la richesse à votre personnage <text:span text:style-name="T5">en inventant une vie à votre personnage en dehors des tristes événements qui vous rassemblent </text:span><text:span text:style-name="T6">ce soir. </text:span>Si une information n'est pas spécifiée dans votre fiche de personnage, vous pouvez à priori la remplir.</text:p>
      <text:p text:style-name="P2"/>
      <text:h text:style-name="P5" text:outline-level="1">Règles de sécurité</text:h>
      <text:p text:style-name="P2"/>
      <text:p text:style-name="P2"><text:tab/>Certains des personnages présentés par les fiches de personnages possèdent des intentions douteuses voire criminelles à la manière d'un roman policier. Autant que possible, faites attention aux autres joueurs en incarnant vos personnages. Ce n'est pas parce qu'un propos est dit par un personnage fictif qu'il ne fait pas de mal.</text:p>
      <text:p text:style-name="P2"/>
      <text:p text:style-name="P2">Le jour J, les organisateurs présenteront des règles de sécurité qu'il faudra suivre.</text:p>
      <text:h text:style-name="P7" text:outline-level="1">Votre personnage : <text:span text:style-name="T7">John</text:span><text:span text:style-name="T8"> Bertham</text:span></text:h>
      <text:p text:style-name="P8"/>
      <text:p text:style-name="P9">Avez-vous tué quelqu'un ?</text:p>
      <text:p text:style-name="P8"/>
      <text:p text:style-name="P8">Non. <text:span text:style-name="T9">Vous n’avez rien à vous reprocher.</text:span></text:p>
      <text:p text:style-name="P8"/>
      <text:p text:style-name="P9">Qui êtes-vous ?</text:p>
      <text:p text:style-name="P8"/>
      <text:p text:style-name="P8"><text:tab/>John Bertham, fils cadet de Lord Bertham. Viveur, joyeux, exalté et sanguin, vous ne machez pas vos mots et au grand damn de feu votre père, vous n'avez aucune crainte du scandale.</text:p>
      <text:p text:style-name="P8"><text:tab/>Votre frère ainé est Gabriel Bertham : un homme tout en règles et en principes. Votre soeur est Patience Bertham : une femme timide mais avec un grain d'extravagance qu'il faudrait cultiver pour en faire de belles fleurs.</text:p>
      <text:h text:style-name="P5" text:outline-level="1">Votre emploi du temps</text:h>
      <text:p text:style-name="P8"/>
      <text:p text:style-name="P9">### Il y a 5 ans - Lord Bertham</text:p>
      <text:p text:style-name="P8"/>
      <text:p text:style-name="P8"><text:tab/>Il y a des gens qui sont nés avec un balais dans le cul et il y en a qui ont la place pour tout le cagibi. Votre père appartenait à la deuxième catégorie de personnes. Après la mort de votre mère, il était passé d'exaspérant à intolérable. Vous vous disputiez constamment avec lui sur votre avenir (il ne cautionnait pas votre goût pour les arts dramatiques) et avec votre tempérament volcanique, chaque dispute se terminait par des menaces violentes.</text:p>
      <text:p text:style-name="P8"/>
      <text:p text:style-name="P8"><text:tab/>Fort heureusement, le grand magicien BumbleTwit parvenait à calmer les colères de votre père en invoquant l'esprit de votre défunte mère lors de séances de spiritisme. Lors de ces séances, plusieurs miracles se produisaient et vous avez même pris l'habitude d'y assister dès que possible.</text:p>
      <text:p text:style-name="P8"/>
      <text:p text:style-name="P8"><text:tab/>Le jour la mort de votre père, vous avez appris que celui-ci souhaitait modifier son testament pour léguer sa fortune à Lord BumbleTwit. Furieux par cette tournure des événements (vous aviez besoin de l'argent pour financer un projet de cabaret et si le vieillard ne voulait pas clamser, vous auriez aimé l'étrangler), vous vous êtes rué vers la chambre de votre père. La porte étant fermée à clé, vous avez gueulé pendant vingt bonnes minutes devant la porte. Vous vous êtes ensuite senti profondément ridicule. D'autant plus quand Archie est passé dans le couloir et vous a demandé "tout va bien monsieur ?". Vous êtes descendu dans le jardin pour vous changer les idées. C'est alors que vous avez <text:span text:style-name="T10">croisé</text:span> Lord BumbleTwit. Vous vous êtes alors promené dans la grande propriété tout en parlant de théâtre pendant une bonne heure. En revenant de votre promenade, Bobby Watson et Carl Bluefinch (le jardinier et l<text:span text:style-name="T11">e</text:span> domestique de la maison Bertham) vous ont appris que votre père était mort. Quelle aubaine ! La police a bien entendu fait n'importe quoi et l'arme du crime n'a jamais été retrouvée. <text:span text:style-name="T12">Quelle bande d’incapables !</text:span></text:p>
      <text:p text:style-name="P8"/>
      <text:p text:style-name="P8">La maison a été vendue et vous avez pu financer votre projet de cabaret !</text:p>
      <text:p text:style-name="P8"/>
      <text:p text:style-name="P9">### Quelques jours avant la réception</text:p>
      <text:p text:style-name="P8"/>
      <text:p text:style-name="P8"><text:soft-page-break/><text:tab/>Vous avez reçu un billet d'un mauvais plaisant affirmant qu'il savait des secrets sur l'affaire Bertham. Vous avez décidé de ne pas y prêter attention. Vous n'avez rien à cacher que diable !</text:p>
      <text:p text:style-name="P8"/>
      <text:p text:style-name="P9">### Lord BumbleTwit</text:p>
      <text:p text:style-name="P8"/>
      <text:p text:style-name="P10"><text:tab/>Votre cabaret a connu quelques déboires lors des dernières années et vous avez besoin d'argent pour financer votre prochain grand spectacle. N'ayant que peu de relations fréquentables, vous avez chargé Amanda Red de défendre vos intérêts et de vous trouver quelques mécènes pour vos spectacles. Lord BumbleTwit peut-être ?</text:p>
      <text:p text:style-name="P10"/>
      <text:p text:style-name="P10"><text:tab/>Vous êtes arrivé à la soirée de Lord BumbleTwit vers 18h15. En amateur de spectacle, vous appréciez beaucoup le fait de voir les gens vaquer et le personnel s'activer. Gabriel avait rendez-vous avec Lord BumbleTwit mais il ne voulait pas vous dire à quel sujet. Vous avez donc pris le temps de parler avec Patience pour voir ce qu'elle devenait. Elle vous répondait à peine, visiblement occupée à autre chose. D'abord Gabriel puis Patience, ils sont tous à cran dis donc ! Lors du repas, vous étiez assis à côté du Docteur Derelict qui sembla très étonné en voyant le déjeuner qu'on lui servait. C'est la première fois qu'il voit des poissons panés ? Il s'attendait à quoi ? <text:span text:style-name="T13">Du foie gras ?</text:span></text:p>
      <text:p text:style-name="P10"/>
      <text:p text:style-name="P10"><text:tab/>Vous étiez 6 à assister à la séance de spiritisme : Bobby Watson, Gabriel, Patience, Luca et le docteur Derelict. La salle était vraiment surchauffé décidément ! On se croyait en enfer. Vous avez cherché du regard Amanda Red sans la trouver : elle ne voulait rater cette séance pour rien au monde, pourquoi n'est-elle pas venue ? Vous n'avez pas eu le temps d'approfondir la question car la séance a commmencé. Assis autour d'une table à l'allure très lourde, vous avez commencé par appeler l'esprit de votre père. C'est alors que la table s'est mise à trembler et de la fumée venue des tréfonds de la terre s'est répandue dans la pièce. Quels miracles ! La voix de Lord BumbleTwit s'est faite alors plus suppliante alors qu'il priait l'esprit de Lord Bertham de venir les aider à résoudre le mystère de sa mort. Les lumières ont tremblé et des bruits de chaines se sont fait entendre tandis que la baie vitrée s'est couverte de traces de mains des morts ! Voulant voir le p<text:span text:style-name="T14">hénomène</text:span> plus près, vous vous êtes rapproché des fenêtre pour sentir un courant d'air frais vous parcourir. C'est alors qu'une voix rocailleuse s'est élevée "C'est mon fils qui m'a tué !". La voix des morts avait parlé depuis la gorge de Lord BumbleTwit qui fut alors pris d'une quinte de toux. Il toussa plusieurs fois dans son mouchoir avant d'ajouter "Lord Bertham a parlé".</text:p>
      <text:p text:style-name="P10"/>
      <text:p text:style-name="P10"><text:tab/>Mais c'est quoi cette blague ? Qu'est-ce ce que ce damné medium de ses grands morts avait donc dit ? La connexion aux enfers devait être problématique car cette patate arrogante et plein de vent ne pouvait pas croire ce damné mensonge à l'odeur de charogne ! Ce marin d'eau de vaisselle de sa grande mère la pléripatéticienne de Babylone ! Gabriel a bien essayé de vous calmer mais vous n'alliez pas vous laisser insult<text:span text:style-name="T15">er</text:span> comme cela ! Vous êtes rentré en trombe dans la chambre de Lord BumbleTwit. Le cuistre reposait sur son fauteuil, le regard hautain et son demi-sourire au lèvre. Damnation ! Ce foutriquet se croit donc tellement supérieur ! Vous avez passé la prochaine demie-heure à l'insulter copieusement et à lui faire comprendre son idiotie crassse, qu'il était un ignoble affabulateur qui mériterait d'être dissequé afin que les scientifiques puissent étudier le cadavre et découvrir d'où provient sa mythomanie patentée. Le bougre vous regardait comme un insecte pendant tout votre discours, vous aviez envie de le frapper.</text:p>
      <text:p text:style-name="P10"/>
      <text:p text:style-name="P10"><text:tab/>Après une demie-heure d'insultes, vous aviez encore des choses à lui dire mais comme il faisait soif, vous êtes descendu dans le salon. Furieux et déçu par la tournure des événements, vous avez cherché votre frère dans le salon sans le trouver. Où était-il allé se fourrer le bougre ? De dépit, vous avez pris à part le docteur Derelict et vous avez parlé pendant une bonne heure sur les bienfaits du <text:soft-page-break/>théâtre sur l'expansion de l'âme humaine. C'est alors que, Bobby Watson débarqua dans le salon en criant qu'on avait poignardé Lord BumbleTwit. Vous en êtes resté baba. Mais qu'est-ce qu'ils ont tous à aller clamser juste après une grande engueulade ? Les gens sont tellement fragiles. Arrivant le dernier vers le bureau de Lord BumbleTwit, vous avez trouvé Bobby Watson tremblant, un verre de gin à la main. Vous ne l'imaginiez pas aussi poltron. C'est quand même son deuxième maitre qui meurt.</text:p>
      <text:p text:style-name="P8"/>
      <text:h text:style-name="Heading_20_1" text:outline-level="1">Informations que vous voulez garder secrètes</text:h>
      <text:p text:style-name="P8"/>
      <text:p text:style-name="P8"><text:tab/>Il y a plusieurs informations que vous préféreriez dissimuler. Vous ne pouvez pas révéler ces informations de vous-mêmes. Si un autre joueur vous pose des questions sur ces sujets, évitez les questions, échappez vous ou indignez-vous. Si un autre joueur vous présente l'information (il a découvert le peau aux roses), vous pouvez reconnaitre les faits mais que à ce joueur.</text:p>
      <text:p text:style-name="P8"/>
      <text:p text:style-name="P8"><text:tab/>Vous n'avez rien à cacher ! Vous êtes la cible d'une conspiration inique contre vous ! Ah oui par contre, si on pouvait éviter de mentionner que vous avez engueulé une porte pendant vingt minutes le jour de la mort de votre père, ce serait bien.</text:p>
      <text:p text:style-name="P8"/>
      <text:h text:style-name="Heading_20_1" text:outline-level="1">Objectifs</text:h>
      <text:p text:style-name="P8"/>
      <text:p text:style-name="P8">- Tunnelisez quelqu'un pendant au moins 5 minutes en ralant sur les jeunes qui ne vont pas suffisamment au théâtre.</text:p>
      <text:p text:style-name="P8">- Trouvez des gens pour vous aider à financer votre prochain spectacle au cabaret.</text:p>
      <text:p text:style-name="P8">- Trouvez ce qui perturbait Gabriel et Patience.</text:p>
      <text:p text:style-name="P8"/>
      <text:h text:style-name="Heading_20_1" text:outline-level="1">Conseils de jeux</text:h>
      <text:p text:style-name="P8"/>
      <text:list text:style-name="L4">
        <text:list-item>
          <text:p text:style-name="P11">Vous êtes quelqu'un de fier et vous n'avez rien à vous reprocher. Qu'importe ce que les gens pensent, vous allez leur dire votre façon de penser !</text:p>
        </text:list-item>
        <text:list-item>
          <text:p text:style-name="P11">- Amusez-vous bi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2T23:42:34.162208440</meta:creation-date>
    <dc:date>2026-07-13T00:42:40.687485168</dc:date>
    <meta:editing-duration>PT54M42S</meta:editing-duration>
    <meta:editing-cycles>200</meta:editing-cycles>
    <meta:generator>LibreOffice/26.2.4.2$Linux_X86_64 LibreOffice_project/620$Build-2</meta:generator>
    <meta:document-statistic meta:table-count="0" meta:image-count="0" meta:object-count="0" meta:page-count="5" meta:paragraph-count="63" meta:word-count="2144" meta:character-count="12517" meta:non-whitespace-character-count="10428"/>
  </office:meta>
</office:document-meta>
</file>