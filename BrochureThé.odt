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T1" style:family="text">
      <style:text-properties officeooo:rsid="0008ef0b"/>
    </style:style>
    <style:style style:name="T2" style:family="text">
      <style:text-properties officeooo:rsid="0009af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MICALE DES BUVEURS DE THÉ</text:span></text:h>
      <text:h text:style-name="Heading_20_3" text:outline-level="3"><text:span text:style-name="Emphasis">Depuis 1750. Parce qu'il faut bien commencer un jour.</text:span></text:h>
      <text:p text:style-name="Horizontal_20_Line"/>
      <text:h text:style-name="Heading_20_1" text:outline-level="1">Qui sommes-nous ?</text:h>
      <text:p text:style-name="Text_20_body">L'Amicale des Buveurs de Thé est une association de passionnés réunis autour d'une activité aussi exigeante que spectaculaire :</text:p>
      <text:p text:style-name="Text_20_body"><text:span text:style-name="Strong_20_Emphasis">Boire du thé.</text:span></text:p>
      <text:p text:style-name="Text_20_body">Nous nous réunissons régulièrement pour boire du thé ensemble. Puis nous continuons à boire du thé. Ensuite, selon les circonstances, nous reprenons une tasse <text:span text:style-name="T1">ou alors nous allons au</text:span><text:span text:style-name="T2">x</text:span><text:span text:style-name="T1"> toilette</text:span><text:span text:style-name="T2">s</text:span>.</text:p>
      <text:p text:style-name="Horizontal_20_Line"/>
      <text:h text:style-name="Heading_20_1" text:outline-level="1">Notre philosophie</text:h>
      <text:p text:style-name="Text_20_body">Le thé, c'est avant tout un voyage.</text:p>
      <text:p text:style-name="Text_20_body">Un voyage de quelques minutes entre la bouilloire et votre tasse.</text:p>
      <text:p text:style-name="Text_20_body">Nous préférons une définition plus scientifique :</text:p>
      <text:p text:style-name="Quotations"><text:span text:style-name="Emphasis">Le thé est plus ou moins de l'eau dans laquelle on a </text:span><text:span text:style-name="Emphasis"><text:span text:style-name="T1">fait cuire de </text:span></text:span><text:span text:style-name="Emphasis">l'herbe.</text:span></text:p>
      <text:p text:style-name="Horizontal_20_Line"/>
      <text:h text:style-name="Heading_20_1" text:outline-level="1">Une expérience millénaire</text:h>
      <text:list text:style-name="L1">
        <text:list-item>
          <text:p text:style-name="P1">Fondée en <text:span text:style-name="Strong_20_Emphasis">1750</text:span>. </text:p>
        </text:list-item>
        <text:list-item>
          <text:p text:style-name="P1">Âge moyen des membres : <text:span text:style-name="Strong_20_Emphasis">1200 ans</text:span>. <text:span text:style-name="T1">(certains des membres fondateurs font encore partie de l’association)</text:span> </text:p>
        </text:list-item>
        <text:list-item>
          <text:p text:style-name="P2">Nombre de tasses consommées : nous avons arrêté de compter après la troisième. </text:p>
        </text:list-item>
      </text:list>
      <text:p text:style-name="Horizontal_20_Line"/>
      <text:h text:style-name="Heading_20_1" text:outline-level="1">Nos activités</text:h>
      <text:p text:style-name="Text_20_body">Nous proposons un large éventail d'activités :</text:p>
      <text:list text:style-name="L2">
        <text:list-item>
          <text:p text:style-name="P3">Boire du thé. </text:p>
        </text:list-item>
        <text:list-item>
          <text:p text:style-name="P3">Discuter du thé. </text:p>
        </text:list-item>
        <text:list-item>
          <text:p text:style-name="P3">Attendre que le thé refroidisse. </text:p>
        </text:list-item>
        <text:list-item>
          <text:p text:style-name="P3"><text:soft-page-break/>Dire : « C'est chaud. » </text:p>
        </text:list-item>
        <text:list-item>
          <text:p text:style-name="P3">Dire ensuite : « Maintenant il est froid. » </text:p>
        </text:list-item>
        <text:list-item>
          <text:p text:style-name="P4">Refaire du thé. </text:p>
        </text:list-item>
      </text:list>
      <text:p text:style-name="Horizontal_20_Line"/>
      <text:h text:style-name="Heading_20_1" text:outline-level="1">Pourquoi nous rejoindre ?</text:h>
      <text:p text:style-name="Text_20_body">Parce que chez nous :</text:p>
      <text:list text:style-name="L3">
        <text:list-item>
          <text:p text:style-name="P5">personne ne juge votre manière de tenir une tasse ; </text:p>
        </text:list-item>
        <text:list-item>
          <text:p text:style-name="P5">le débat « avec ou sans sucre » dure depuis environ 1842 ; </text:p>
        </text:list-item>
        <text:list-item>
          <text:p text:style-name="P6">nous acceptons tous les amateurs de thé, du novice au buveur professionnel. </text:p>
        </text:list-item>
      </text:list>
      <text:p text:style-name="Text_20_body">Une seule condition :<text:line-break/><text:span text:style-name="Strong_20_Emphasis">aimer le thé.</text:span></text:p>
      <text:p text:style-name="Text_20_body">Ou au moins faire semblant pendant les cinq<text:span text:style-name="T1">uante prochaines années</text:span>.</text:p>
      <text:p text:style-name="Horizontal_20_Line"/>
      <text:h text:style-name="Heading_20_1" text:outline-level="1">Soutenez notre noble cause</text:h>
      <text:p text:style-name="Text_20_body">Vos dons permettent à nos fabuleux utilisateurs de pouvoir se payer des tasses de thé.</text:p>
      <text:p text:style-name="Text_20_body">Sans votre générosité, ils seraient contraints de boire de l'eau <text:span text:style-name="T1">et toute l’Angleterre en serait bouleversé. Vous faite un peu un acte patriotique en fait.</text:span></text:p>
      <text:p text:style-name="Horizontal_20_Line"/>
      <text:h text:style-name="Heading_20_1" text:outline-level="1">Questions fréquentes</text:h>
      <text:p text:style-name="Text_20_body"><text:span text:style-name="Strong_20_Emphasis">Organisez-vous d'autres activités ?</text:span><text:line-break/>Nous avons envisagé de boire du café, mais la proposition a été rejetée à l'unanimité.</text:p>
      <text:p text:style-name="Text_20_body"><text:span text:style-name="Strong_20_Emphasis">Votre moyenne d'âge de 1200 ans est-elle exacte ?</text:span><text:line-break/>Absolument. Les statistiques n'ont jamais été contestées par nos membres les plus âgés. Ils dorment.</text:p>
      <text:p text:style-name="Text_20_body"><text:span text:style-name="Strong_20_Emphasis">Depuis quand existez-vous ?</text:span><text:line-break/>Depuis 1750. Nous étions déjà présents avant que cela ne devienne tendance.</text:p>
      <text:p text:style-name="Horizontal_20_Line"/>
      <text:h text:style-name="Heading_20_1" text:outline-level="1">Notre devise</text:h>
      <text:p text:style-name="Quotations"><text:span text:style-name="Strong_20_Emphasis">"Une tasse à la fois. Éventuellement une deuxième."</text:span></text:p>
      <text:p text:style-name="Horizontal_20_Line"/>
      <text:h text:style-name="Heading_20_3" text:outline-level="3"><text:soft-page-break/>Amicale des Buveurs de Thé</text:h>
      <text:p text:style-name="Text_20_body"><text:span text:style-name="Strong_20_Emphasis">Depuis 1750. Toujours en infusion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2:32:14.827895077</meta:creation-date>
    <dc:date>2026-07-14T13:08:33.096224501</dc:date>
    <meta:editing-duration>PT22M16S</meta:editing-duration>
    <meta:editing-cycles>1</meta:editing-cycles>
    <meta:document-statistic meta:table-count="0" meta:image-count="0" meta:object-count="0" meta:page-count="3" meta:paragraph-count="41" meta:word-count="383" meta:character-count="2234" meta:non-whitespace-character-count="1892"/>
    <meta:generator>LibreOffice/25.8.0.4$Linux_X86_64 LibreOffice_project/48f00303701489684e67c38c28aff00cd5929e67</meta:generator>
  </office:meta>
</office:document-meta>
</file>