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miri" svg:font-family="Amiri" style:font-pitch="variable"/>
    <style:font-face style:name="Caladea" svg:font-family="Caladea" style:font-family-generic="roman" style:font-pitch="variable"/>
    <style:font-face style:name="Carlito" svg:font-family="Carlito" style:font-family-generic="swiss" style:font-pitch="variable"/>
    <style:font-face style:name="David Libre" svg:font-family="'David Libre'" style:font-pitch="variable"/>
    <style:font-face style:name="DejaVu Math TeX Gyre" svg:font-family="'DejaVu Math TeX Gyre'" style:font-pitch="variable"/>
    <style:font-face style:name="Lato Semibold" svg:font-family="'Lato Semi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URW Chancery L" svg:font-family="'URW Chancery L'"/>
  </office:font-face-decls>
  <office:automatic-styles>
    <style:style style:name="P1" style:family="paragraph" style:parent-style-name="Standard">
      <style:paragraph-properties fo:text-align="justify" style:justify-single-word="false"/>
      <style:text-properties style:font-name="URW Chancery L" fo:font-size="20pt" style:font-size-asian="20pt" style:font-size-complex="20pt"/>
    </style:style>
    <style:style style:name="P2" style:family="paragraph" style:parent-style-name="Standard">
      <style:paragraph-properties fo:text-align="justify" style:justify-single-word="false" fo:break-before="page"/>
      <style:text-properties style:font-name="DejaVu Math TeX Gyre" fo:font-size="16pt" style:font-size-asian="16pt" style:font-size-complex="16pt"/>
    </style:style>
    <style:style style:name="P3" style:family="paragraph" style:parent-style-name="Standard">
      <style:paragraph-properties fo:text-align="justify" style:justify-single-word="false"/>
      <style:text-properties style:font-name="DejaVu Math TeX Gyre" fo:font-size="16pt" style:font-size-asian="16pt" style:font-size-complex="16pt"/>
    </style:style>
    <style:style style:name="P4" style:family="paragraph" style:parent-style-name="Standard">
      <style:paragraph-properties fo:text-align="justify" style:justify-single-word="false"/>
      <style:text-properties style:font-name="DejaVu Math TeX Gyre" fo:font-size="16pt" officeooo:paragraph-rsid="0071e7d6" style:font-size-asian="16pt" style:font-size-complex="16pt"/>
    </style:style>
    <style:style style:name="P5" style:family="paragraph" style:parent-style-name="Standard">
      <style:paragraph-properties fo:text-align="justify" style:justify-single-word="false"/>
      <style:text-properties style:font-name="DejaVu Math TeX Gyre" fo:font-size="16pt" officeooo:paragraph-rsid="0071fad6" style:font-size-asian="16pt" style:font-size-complex="16pt"/>
    </style:style>
    <style:style style:name="P6" style:family="paragraph" style:parent-style-name="Standard">
      <style:paragraph-properties fo:text-align="justify" style:justify-single-word="false" fo:break-before="page"/>
      <style:text-properties style:font-name="Caladea" fo:font-size="16pt" style:font-size-asian="16pt" style:font-size-complex="16pt"/>
    </style:style>
    <style:style style:name="P7" style:family="paragraph" style:parent-style-name="Standard">
      <style:paragraph-properties fo:text-align="justify" style:justify-single-word="false"/>
      <style:text-properties style:font-name="Caladea" fo:font-size="16pt" style:font-size-asian="16pt" style:font-size-complex="16pt"/>
    </style:style>
    <style:style style:name="P8" style:family="paragraph" style:parent-style-name="Standard">
      <style:paragraph-properties fo:text-align="justify" style:justify-single-word="false" fo:break-before="page"/>
      <style:text-properties style:font-name="URW Chancery L" fo:font-size="20pt" style:font-size-asian="20pt" style:font-size-complex="20pt"/>
    </style:style>
    <style:style style:name="P9" style:family="paragraph" style:parent-style-name="Standard">
      <style:paragraph-properties fo:text-align="justify" style:justify-single-word="false" fo:break-before="page"/>
      <style:text-properties style:font-name="Amiri" fo:font-size="16pt" style:font-size-asian="16pt" style:font-size-complex="16pt"/>
    </style:style>
    <style:style style:name="P10" style:family="paragraph" style:parent-style-name="Standard">
      <style:paragraph-properties fo:text-align="justify" style:justify-single-word="false"/>
      <style:text-properties style:font-name="Amiri" fo:font-size="16pt" style:font-size-asian="16pt" style:font-size-complex="16pt"/>
    </style:style>
    <style:style style:name="P11" style:family="paragraph" style:parent-style-name="Standard">
      <style:paragraph-properties fo:text-align="justify" style:justify-single-word="false" fo:break-before="page"/>
      <style:text-properties style:font-name="Lato Semibold" fo:font-size="16pt" officeooo:rsid="00521b87" officeooo:paragraph-rsid="00521b87" style:font-size-asian="16pt" style:font-size-complex="16pt"/>
    </style:style>
    <style:style style:name="P12" style:family="paragraph" style:parent-style-name="Standard">
      <style:paragraph-properties fo:text-align="justify" style:justify-single-word="false"/>
      <style:text-properties style:font-name="Lato Semibold" fo:font-size="16pt" officeooo:rsid="00521b87" officeooo:paragraph-rsid="00521b87" style:font-size-asian="16pt" style:font-size-complex="16pt"/>
    </style:style>
    <style:style style:name="P13" style:family="paragraph" style:parent-style-name="Standard">
      <style:paragraph-properties fo:text-align="justify" style:justify-single-word="false" fo:break-before="page"/>
      <style:text-properties style:font-name="URW Chancery L" fo:font-size="20pt" officeooo:rsid="00521b87" officeooo:paragraph-rsid="00602ad1" style:font-size-asian="20pt" style:font-size-complex="20pt"/>
    </style:style>
    <style:style style:name="P14" style:family="paragraph" style:parent-style-name="Standard">
      <style:paragraph-properties fo:text-align="justify" style:justify-single-word="false"/>
      <style:text-properties style:font-name="URW Chancery L" fo:font-size="20pt" officeooo:rsid="00521b87" officeooo:paragraph-rsid="00602ad1" style:font-size-asian="20pt" style:font-size-complex="20pt"/>
    </style:style>
    <style:style style:name="P15" style:family="paragraph" style:parent-style-name="Standard">
      <style:paragraph-properties fo:text-align="justify" style:justify-single-word="false"/>
      <style:text-properties style:font-name="URW Chancery L" fo:font-size="20pt" officeooo:rsid="00521b87" officeooo:paragraph-rsid="00521b87" style:font-size-asian="20pt" style:font-size-complex="20pt"/>
    </style:style>
    <style:style style:name="P16" style:family="paragraph" style:parent-style-name="Standard">
      <style:paragraph-properties fo:text-align="justify" style:justify-single-word="false" fo:break-before="page"/>
      <style:text-properties style:font-name="David Libre" fo:font-size="20pt" style:font-size-asian="20pt" style:font-size-complex="20pt"/>
    </style:style>
    <style:style style:name="P17" style:family="paragraph" style:parent-style-name="Standard">
      <style:paragraph-properties fo:text-align="justify" style:justify-single-word="false"/>
      <style:text-properties style:font-name="David Libre" fo:font-size="20pt" style:font-size-asian="20pt" style:font-size-complex="20pt"/>
    </style:style>
    <style:style style:name="P18" style:family="paragraph" style:parent-style-name="Standard">
      <style:paragraph-properties fo:text-align="justify" style:justify-single-word="false" fo:break-before="page"/>
      <style:text-properties style:font-name="URW Chancery L" fo:font-size="20pt" officeooo:rsid="0044e74d" officeooo:paragraph-rsid="0044e74d" style:font-size-asian="20pt" style:font-size-complex="20pt"/>
    </style:style>
    <style:style style:name="P19" style:family="paragraph" style:parent-style-name="Standard">
      <style:paragraph-properties fo:text-align="justify" style:justify-single-word="false" fo:break-before="page"/>
      <style:text-properties style:font-name="URW Chancery L" fo:font-size="20pt" officeooo:rsid="00521b87" officeooo:paragraph-rsid="00521b87" style:font-size-asian="20pt" style:font-size-complex="20pt"/>
    </style:style>
    <style:style style:name="P20" style:family="paragraph" style:parent-style-name="Standard">
      <style:paragraph-properties fo:text-align="justify" style:justify-single-word="false"/>
      <style:text-properties style:font-name="Amiri" fo:font-size="20pt" officeooo:rsid="00521b87" officeooo:paragraph-rsid="00521b87" style:font-size-asian="20pt" style:font-size-complex="20pt"/>
    </style:style>
    <style:style style:name="P21" style:family="paragraph" style:parent-style-name="Standard">
      <style:paragraph-properties fo:text-align="justify" style:justify-single-word="false"/>
      <style:text-properties style:font-name="URW Chancery L" fo:font-size="20pt" officeooo:rsid="001e9780" officeooo:paragraph-rsid="001e9780" style:font-size-asian="20pt" style:font-size-complex="20pt"/>
    </style:style>
    <style:style style:name="P22" style:family="paragraph" style:parent-style-name="Standard">
      <style:paragraph-properties fo:text-align="justify" style:justify-single-word="false"/>
      <style:text-properties style:font-name="URW Chancery L" fo:font-size="20pt" officeooo:rsid="0050653d" officeooo:paragraph-rsid="0050653d" style:font-size-asian="20pt" style:font-size-complex="20pt"/>
    </style:style>
    <style:style style:name="P23" style:family="paragraph" style:parent-style-name="Standard">
      <style:paragraph-properties fo:text-align="justify" style:justify-single-word="false"/>
      <style:text-properties style:font-name="URW Chancery L" fo:font-size="20pt" officeooo:rsid="006c6461" officeooo:paragraph-rsid="006c6461" style:font-size-asian="20pt" style:font-size-complex="20pt"/>
    </style:style>
    <style:style style:name="P24" style:family="paragraph" style:parent-style-name="Standard">
      <style:paragraph-properties fo:text-align="justify" style:justify-single-word="false" fo:break-before="page"/>
      <style:text-properties style:font-name="URW Chancery L" fo:font-size="20pt" officeooo:paragraph-rsid="0046dd4f" style:font-size-asian="20pt" style:font-size-complex="20pt"/>
    </style:style>
    <style:style style:name="P25" style:family="paragraph" style:parent-style-name="Standard">
      <style:paragraph-properties fo:text-align="justify" style:justify-single-word="false"/>
      <style:text-properties style:font-name="URW Chancery L" fo:font-size="20pt" officeooo:paragraph-rsid="00470c4a" style:font-size-asian="20pt" style:font-size-complex="20pt"/>
    </style:style>
    <style:style style:name="P26" style:family="paragraph" style:parent-style-name="Standard">
      <style:paragraph-properties fo:text-align="center" style:justify-single-word="false" fo:break-before="page"/>
      <style:text-properties style:font-name="URW Chancery L" fo:font-size="20pt" officeooo:paragraph-rsid="00470c4a" style:font-size-asian="20pt" style:font-size-complex="20pt"/>
    </style:style>
    <style:style style:name="P27" style:family="paragraph" style:parent-style-name="Standard">
      <style:paragraph-properties fo:text-align="center" style:justify-single-word="false"/>
      <style:text-properties style:font-name="URW Chancery L" fo:font-size="20pt" officeooo:paragraph-rsid="00470c4a" style:font-size-asian="20pt" style:font-size-complex="20pt"/>
    </style:style>
    <style:style style:name="P28" style:family="paragraph" style:parent-style-name="Standard">
      <style:paragraph-properties fo:text-align="center" style:justify-single-word="false"/>
      <style:text-properties style:font-name="URW Chancery L" fo:font-size="20pt" officeooo:rsid="004a2ea9" officeooo:paragraph-rsid="004a2ea9" style:font-size-asian="20pt" style:font-size-complex="20pt"/>
    </style:style>
    <style:style style:name="P29" style:family="paragraph" style:parent-style-name="Standard">
      <style:paragraph-properties fo:text-align="justify" style:justify-single-word="false" fo:break-before="page"/>
      <style:text-properties style:font-name="Carlito" fo:font-size="16pt" officeooo:paragraph-rsid="00470c4a" style:font-size-asian="16pt" style:font-size-complex="16pt"/>
    </style:style>
    <style:style style:name="P30" style:family="paragraph" style:parent-style-name="Standard">
      <style:paragraph-properties fo:text-align="justify" style:justify-single-word="false"/>
      <style:text-properties style:font-name="Carlito" fo:font-size="16pt" officeooo:paragraph-rsid="00470c4a" style:font-size-asian="16pt" style:font-size-complex="16pt"/>
    </style:style>
    <style:style style:name="T1" style:family="text">
      <style:text-properties officeooo:rsid="001389dc"/>
    </style:style>
    <style:style style:name="T2" style:family="text">
      <style:text-properties officeooo:rsid="0063a6c4"/>
    </style:style>
    <style:style style:name="T3" style:family="text">
      <style:text-properties officeooo:rsid="00187bac"/>
    </style:style>
    <style:style style:name="T4" style:family="text">
      <style:text-properties officeooo:rsid="00171f96"/>
    </style:style>
    <style:style style:name="T5" style:family="text">
      <style:text-properties officeooo:rsid="00704660"/>
    </style:style>
    <style:style style:name="T6" style:family="text">
      <style:text-properties officeooo:rsid="00720da8"/>
    </style:style>
    <style:style style:name="T7" style:family="text">
      <style:text-properties officeooo:rsid="00310131"/>
    </style:style>
    <style:style style:name="T8" style:family="text">
      <style:text-properties officeooo:rsid="0035cd72"/>
    </style:style>
    <style:style style:name="T9" style:family="text">
      <style:text-properties officeooo:rsid="00678e5d"/>
    </style:style>
    <style:style style:name="T10" style:family="text">
      <style:text-properties officeooo:rsid="008471d9"/>
    </style:style>
    <style:style style:name="T11" style:family="text">
      <style:text-properties officeooo:rsid="0056c4a3"/>
    </style:style>
    <style:style style:name="T12" style:family="text">
      <style:text-properties officeooo:rsid="005ab035"/>
    </style:style>
    <style:style style:name="T13" style:family="text">
      <style:text-properties officeooo:rsid="00564f23"/>
    </style:style>
    <style:style style:name="T14" style:family="text">
      <style:text-properties officeooo:rsid="005c1c40"/>
    </style:style>
    <style:style style:name="T15" style:family="text">
      <style:text-properties officeooo:rsid="005e1800"/>
    </style:style>
    <style:style style:name="T16" style:family="text">
      <style:text-properties officeooo:rsid="00602ad1"/>
    </style:style>
    <style:style style:name="T17" style:family="text">
      <style:text-properties officeooo:rsid="007c626a"/>
    </style:style>
    <style:style style:name="T18" style:family="text">
      <style:text-properties officeooo:rsid="006a3387"/>
    </style:style>
    <style:style style:name="T19" style:family="text">
      <style:text-properties officeooo:rsid="001e9780"/>
    </style:style>
    <style:style style:name="T20" style:family="text">
      <style:text-properties officeooo:rsid="001f9747"/>
    </style:style>
    <style:style style:name="T21" style:family="text">
      <style:text-properties officeooo:rsid="006ec873"/>
    </style:style>
    <style:style style:name="T22" style:family="text">
      <style:text-properties officeooo:rsid="002a6e01"/>
    </style:style>
    <style:style style:name="T23" style:family="text">
      <style:text-properties officeooo:rsid="005111ec"/>
    </style:style>
    <style:style style:name="T24" style:family="text">
      <style:text-properties fo:font-weight="normal" style:font-weight-asian="normal" style:font-weight-complex="normal"/>
    </style:style>
    <style:style style:name="T25" style:family="text">
      <style:text-properties fo:font-weight="normal" officeooo:rsid="007b5e9e" style:font-weight-asian="normal" style:font-weight-complex="normal"/>
    </style:style>
    <style:style style:name="T26" style:family="text">
      <style:text-properties fo:font-weight="normal" officeooo:rsid="007a88d5" style:font-weight-asian="normal" style:font-weight-complex="normal"/>
    </style:style>
    <style:style style:name="T27" style:family="text">
      <style:text-properties fo:font-weight="normal" officeooo:rsid="00791247" style:font-weight-asian="normal" style:font-weight-complex="normal"/>
    </style:style>
    <style:style style:name="T28" style:family="text">
      <style:text-properties fo:font-weight="normal" officeooo:rsid="0080a910" style:font-weight-asian="normal" style:font-weight-complex="normal"/>
    </style:style>
    <style:style style:name="T29" style:family="text">
      <style:text-properties officeooo:rsid="002ce703"/>
    </style:style>
    <style:style style:name="T30" style:family="text">
      <style:text-properties officeooo:rsid="0073bdd2"/>
    </style:style>
    <style:style style:name="T31" style:family="text">
      <style:text-properties officeooo:rsid="001ed341"/>
    </style:style>
    <style:style style:name="T32" style:family="text">
      <style:text-properties officeooo:rsid="00582bb9"/>
    </style:style>
    <style:style style:name="T33" style:family="text">
      <style:text-properties officeooo:rsid="006f1c21"/>
    </style:style>
    <style:style style:name="T34" style:family="text">
      <style:text-properties officeooo:rsid="004da3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 l’adresse du </text:span>Cabinet de notaire Balthazar &amp; fils</text:p>
      <text:p text:style-name="P1"/>
      <text:p text:style-name="P1">Cher ami,</text:p>
      <text:p text:style-name="P1"/>
      <text:p text:style-name="P1"><text:tab/>Il m'est apparu dernièrement que mes amis n'étaient pas aussi fidèle<text:span text:style-name="T2">s</text:span> que je ne le croya<text:span text:style-name="T3">Z</text:span>is. Pourriez-vous envoyer un notaire à mon domicile ? J'ai besoin de revoir mon testament.</text:p>
      <text:p text:style-name="P1"/>
      <text:p text:style-name="P1">Je crois avoir trouvé un organisme ancestral qui est autrement plus digne de mes finances.</text:p>
      <text:p text:style-name="P1"/>
      <text:p text:style-name="P1">Cordialement</text:p>
      <text:p text:style-name="P1"/>
      <text:p text:style-name="P1">Lord BumbleTwit</text:p>
      <text:p text:style-name="P2"><text:tab/>Le tueur d’Armorial Road a finalement été arrêté à son domicile vendredi dernier. Les forces de police sont intervenues alors qu’il déjeunait tranquillement au bord<text:span text:style-name="T4">E</text:span> de sa piscine avec un rillon sur son poing.</text:p>
      <text:p text:style-name="P3"/>
      <text:p text:style-name="P3"><text:tab/>Pour rappel, cet individu était déjà soupçonné d’avoir fait trois victimes avant son arrestation. L’enquête était dirigée par l’inspecteur Lazare, une figure particulièrement controversée des forces de l’ordre. Selon certaines rumeurs persistantes, il aurait eu recours à plusieurs reprises aux services d’un <text:span text:style-name="T5">devin</text:span> pour l’aider à résoudre ses affaires.</text:p>
      <text:p text:style-name="P3"/>
      <text:p text:style-name="P4"><text:tab/>Les spéculations les plus extravagantes allaient même jusqu’à affirmer que ce <text:span text:style-name="T5">devin</text:span> — que nous appellerons B.B. — aurait le pouvoir de ramener les morts à la vie.</text:p>
      <text:p text:style-name="P3"/>
      <text:p text:style-name="P3"><text:tab/>Face à ces accusations pour le moins surprenantes, l’inspecteur Lazare a tenu à faire une mise au point officielle :</text:p>
      <text:p text:style-name="P3"/>
      <text:p text:style-name="P5">« Il est vrai que nous avons déjà collaboré avec un <text:span text:style-name="T6">médium</text:span> dans le cadre de certaines enquêtes. En revanche, je peux l’affirmer sous serment : cette personne n’a absolument pas la capacité de ramener les morts à la vie. Il ne faut pas non plus prendre les gens pour des imbéciles.</text:p>
      <text:p text:style-name="P6">Lord BumbleTwit,</text:p>
      <text:p text:style-name="P7"/>
      <text:p text:style-name="P7"><text:tab/>J'ai reçu votre lettre et je me suis empressé de la séparer des autres pour <text:span text:style-name="T7">que</text:span> son odeur putride de corruption morale ne vienne pas déteindre sur mes correspondances. Ayant lu son contenu, je pense qu'un bucher aurait été un endroit plus adapté pour la missive que ma boite au lettre.</text:p>
      <text:p text:style-name="P7"/>
      <text:p text:style-name="P7"><text:tab/>Je desapprouve hautement la manière vicieuse avec laquelle vous vous servez des morts pour votre enrichissement personnel. A vrai dire, puisque vous semblez autant apprecier parler avec les défunts, je ne peux que vous enjoindre à aller au diable les rejoindre.</text:p>
      <text:p text:style-name="P7"/>
      <text:p text:style-name="P7"><text:tab/>Je serai présente à votre séance de spiritisme et j'espère bien vous confondre devant toute l'assemblée.</text:p>
      <text:p text:style-name="P7"/>
      <text:p text:style-name="P7"><text:tab/>Une fois votre deshonneur complet et votre honte consommée, n'hésitez pas à repasser au club, vos histoires fantasques sont toujours hilarantes à écouter.</text:p>
      <text:p text:style-name="P7"/>
      <text:p text:style-name="P7">InamicaleEment votre,</text:p>
      <text:p text:style-name="P7"/>
      <text:p text:style-name="P7">Amanda Red</text:p>
      <text:p text:style-name="P8">Cher ami,</text:p>
      <text:p text:style-name="P1"/>
      <text:p text:style-name="P1"><text:tab/>Je suis parvenu à trouver un théâtre intéressé par votre machSine à fumée ! Je ne doute pas que cela pourrait donner lieu à des spectacles plus intéressants que la mélasse douloureuse que nous sommes obligé de supporter actuellement.</text:p>
      <text:p text:style-name="P1">Après négociations, le théâtre a accepté de m'en donner 20 000 livres.</text:p>
      <text:p text:style-name="P1"/>
      <text:p text:style-name="P1">Je vous <text:span text:style-name="T8">remettrai</text:span> en main propre les 50 % qui vous reviennent de droit.</text:p>
      <text:p text:style-name="P1"/>
      <text:p text:style-name="P1">Lord BumbleTwit</text:p>
      <text:p text:style-name="P9">Cher ami,</text:p>
      <text:p text:style-name="P10"/>
      <text:p text:style-name="P10"><text:tab/>J'ai reçu votre invitation pour la séance de spiritisme. Si je me réjouis de vous voir, je vous prierai de réconsidérer le fait de parler avec l'esprit de mon père. Vous savez toute l'affection que j'ai pour vous et j'aimerais faire appel à votre à vos sentiments les plus élevés, ne gachons pas une si belle occasion de se voir avec une affaire aussi sinistre ! J'aurais notammment quelques conseils à vous demander sur une affaire d'argent.</text:p>
      <text:p text:style-name="P10"/>
      <text:p text:style-name="P10"><text:tab/>Je <text:span text:style-name="T9">me réjouis de vous voir mais je</text:span> vous implore de ne pas chercher à troubler la sérénité que nous Tavons mis si longtemps à retrouver. Laissons dormir les morts et ayons pitié des vivants. Je crains <text:span text:style-name="T10">que votre projet</text:span> ne fasse plus de mal que de bien. </text:p>
      <text:p text:style-name="P10"/>
      <text:p text:style-name="P10">Amicalement votre</text:p>
      <text:p text:style-name="P10"/>
      <text:p text:style-name="P10">Gabriel Bertham</text:p>
      <text:p text:style-name="P11">Patron,</text:p>
      <text:p text:style-name="P12"/>
      <text:p text:style-name="P12"><text:tab/>Le jardin m’a chuchoté à l’oreille que la marque de Belzébuth vous poursuit. <text:span text:style-name="T11">Afin de pouvoir </text:span><text:span text:style-name="T12">des signes plus tangibles, j’ai étudié </text:span><text:span text:style-name="T13">les entrailles d’un pigeon albinos élevé sous un crepuscule perpétuel. </text:span><text:span text:style-name="T14">Le secret m’a alors mis en garde contre les fruits secs. </text:span><text:span text:style-name="T15">Méfiez-vous des fruits secs.</text:span></text:p>
      <text:p text:style-name="P12"/>
      <text:p text:style-name="P12">B.W.</text:p>
      <text:p text:style-name="P13">Cher amiR,</text:p>
      <text:p text:style-name="P14"><text:span text:style-name="T16"><text:tab/>J’</text:span>ai entendu dire que vous embauchez un certain Luca Mason pour livrer vos colis. Il s'agit d'un vieil ami à moi. Serait-il possible de lui confier la livraison de mon colis ? Je serais enchanté de pouvoir échanger avec lui.</text:p>
      <text:p text:style-name="P15"/>
      <text:p text:style-name="P15">Tant que vous y êtes, donnez-lui sa journée.</text:p>
      <text:p text:style-name="P8"><text:tab/>Je viens d'apprendre quelCque chose qui me laisse perplexe. Pourriez-vous me retrouver en ville à 17h au club "la boule noire" ?</text:p>
      <text:p text:style-name="P1"/>
      <text:p text:style-name="P1">Amicalement</text:p>
      <text:p text:style-name="P1"/>
      <text:p text:style-name="P1">Lord BumbleTwit</text:p>
      <text:p text:style-name="P9">BumbleTwit,</text:p>
      <text:p text:style-name="P10"/>
      <text:p text:style-name="P10">C'est quoi ce binz ? Qu'est-ce donc que cette soirée du plus mauvais goût ? Vous espérez quoi au juste ?</text:p>
      <text:p text:style-name="P10"/>
      <text:p text:style-name="P10"><text:tab/>Laissez-moi vous le dire tout net : vous faites fausse route. Les policemeNn sont des incapables et vous voulez <text:span text:style-name="T17">vous faire</text:span> justice, soit. Mais de tous les morts à qui parler, il y en a des millions de plus intéressants que mon père. Si on se limite aux morts assassinés, on en possède encore des milliers. Tenez en voici un mort intéressant : j'adorerais parler à Shakespeare. D'ailleurs, Shakespeare était-il qu'une seule personne ? Si on veut parler à son âme, est-ce que l'on parle à cinq personnes à la fois ou à qu'une seule ? Avait-il une soeur aussi géniale que lui ? <text:span text:style-name="T18">Tellement de questions autrement plus intéressantes que “qui a tué le vieux schnock”.</text:span></text:p>
      <text:p text:style-name="P10"/>
      <text:p text:style-name="P10"><text:tab/>En cinq ans, aucun nouvel élément n'est venu apporter de la lumière sur la mort de mon père. Je ne vois pas votre intérêt à ressuciter ces vieux trucs. Je peux déjà imaginer votre sourire goguenard me dire que précisément "ressuciter des vieux trucs" est votre métier. Si je peux mettre mon grain de sel, vous devriez vous mêler de ce qui vous regarde. Un jour un malheur vous arrivera et vous ne pourrez vous en prendre qu'à vous-même.</text:p>
      <text:p text:style-name="P10"/>
      <text:p text:style-name="P10">Cordialement</text:p>
      <text:p text:style-name="P10"/>
      <text:p text:style-name="P10">John Bertham</text:p>
      <text:p text:style-name="P16">My Lord,</text:p>
      <text:p text:style-name="P17"/>
      <text:p text:style-name="P17"><text:tab/>Votre machine a fumée est tout bonnement phénoménale ! Je serai très heureux de pouvoir en doter ma salle de théâtre. Vous trouverez joint à cette missive un chèque de 50 000 livres. Si vous voulez vendre d'autres inventions, je vous prie de me contacter en toute diligence !</text:p>
      <text:p text:style-name="P17"/>
      <text:p text:style-name="P17"><text:tab/>Serait-il possible d'installer la machine avant mardi ? Il doit se jouer la flûte enchantée et faire apparaitre Zarastro dans un nuage de fumée devrait être du plus bel effet.</text:p>
      <text:p text:style-name="P17"/>
      <text:p text:style-name="P17">Votre serviteur,</text:p>
      <text:p text:style-name="P17"/>
      <text:p text:style-name="P17">Samuel Bricault</text:p>
      <text:p text:style-name="P18">Journal de Lord BumbleTwit :</text:p>
      <text:p text:style-name="P1"/>
      <text:p text:style-name="P1">Le patrouilleOur municipal a signalé que le marché du quartier ne serait pas annulé malgré une météo pluvieuse.</text:p>
      <text:p text:style-name="P19">Pétales de roses</text:p>
      <text:p text:style-name="P20">Coeur d’une mandragore</text:p>
      <text:p text:style-name="P12">Larmes de dragons</text:p>
      <text:p text:style-name="P15">Ecorces de lune</text:p>
      <text:p text:style-name="P8">Mon cher Gregor,</text:p>
      <text:p text:style-name="P1"/>
      <text:p text:style-name="P1"><text:tab/>J'ai pu consulter les comptes que vous m'avez fait parvenir et je dois dire que les chiffres m'étonnent beaucoup. Si je ne doute pas une seule seconde que vous savez maitriser les chiffres, je ne peux m'empêcher de constater que cela fait plusieurs années que les dépenses de la maisonnée n'ont fait qu'augmenter sans que mon train de vie n'ait changé d'un iota. Quelqu'un essaie de m'arnaquer et j'espère que ce n'est pas vous.</text:p>
      <text:p text:style-name="P1"/>
      <text:p text:style-name="P1"><text:tab/>Veuillez m'apporter au plus tôt le détail de mes comptes, j'aurais besoin d'examiner le problème avec plus de détails.</text:p>
      <text:p text:style-name="P1"/>
      <text:p text:style-name="P1">Cordialement,</text:p>
      <text:p text:style-name="P1"/>
      <text:p text:style-name="P1">Lord BumbleTwit</text:p>
      <text:p text:style-name="P8">Chers amis,</text:p>
      <text:p text:style-name="P1"><text:tab/>La formule que vous allez mettre au point est un de mes secrets les mieux gardés. Je suis parvenu à mettre au point un breuvage exceptionnel. Une potion si potente qu'elle pourrait même réveiller un mort. Il s'agit d'un secret si merveilleux que je ne voulais pas qu'il disparaisse avec moi et si dangeureux que je ne voulais pas le confier au premier venu. J'ai jugé bon de le dissimuler dans certaines enigmes tortueuses. Quand vous aurez résolu toutes les enigmes, vous pourrez recomposer la formule :</text:p>
      <text:p text:style-name="P1"/>
      <text:p text:style-name="P1">- (7) (2) à la (9).</text:p>
      <text:p text:style-name="P1">- Du (1) du <text:span text:style-name="T19">(19)</text:span>.</text:p>
      <text:p text:style-name="P1">- (4) mg <text:s/><text:span text:style-name="T20">de </text:span>(11)(t) de (5)</text:p>
      <text:p text:style-name="P1">- Un peu de (8)</text:p>
      <text:p text:style-name="P1">- Une pincée de (15)</text:p>
      <text:p text:style-name="P1">- Du jus (17) (18)</text:p>
      <text:p text:style-name="P1">- (10)</text:p>
      <text:p text:style-name="P1">- Quelques gouttes de (14) <text:span text:style-name="T21">(21) </text:span>vieilli de (13)</text:p>
      <text:p text:style-name="P1">- <text:span text:style-name="T22">(</text:span>16)</text:p>
      <text:p text:style-name="P1">- <text:span text:style-name="T23">(20)</text:span></text:p>
      <text:p text:style-name="P1">-(3) pétales d'un (6) cueilli à (12).</text:p>
      <text:p text:style-name="P1"/>
      <text:p text:style-name="P8">(1) <text:span text:style-name="T24">Amanda dit que j'ai un grain. </text:span><text:span text:style-name="T25">Espérons que ce soit un qu’elle aime</text:span><text:span text:style-name="T24">.</text:span></text:p>
      <text:p text:style-name="P1">(2) <text:span text:style-name="T24">On prétend que je perd la boule. </text:span><text:span text:style-name="T26">J’en ai trouvé une de substitution.</text:span></text:p>
      <text:p text:style-name="P1">(3) Je suis un homme connu et occupé ! J'avais X rdv dans l'après-midi !</text:p>
      <text:p text:style-name="P1">(4) Je me suis fait bien de l'argent en vendant du vent ! Combien exactement ?</text:p>
      <text:p text:style-name="P1">(5) Une très belle ville, mais ce n'est pas en Angleterre que je pourrais dépenser cette pièce.</text:p>
      <text:p text:style-name="P1">(6) C'est mon bouquet préféré.</text:p>
      <text:p text:style-name="P1">(7) <text:span text:style-name="T27">Ainsi donc, on va boire mon héritage.</text:span></text:p>
      <text:p text:style-name="P1">(8) Alors comme ça il ne pourra pas venir ?</text:p>
      <text:p text:style-name="P1">(9) Un sourire peut cacher bien des choses.</text:p>
      <text:p text:style-name="P1">(10) Puisque John semble décidé à me le donner.</text:p>
      <text:p text:style-name="P1">(11) <text:span text:style-name="T28">Gabriel 12, 9</text:span></text:p>
      <text:p text:style-name="P1">(12) C'était une coureuse de <text:span text:style-name="T29">moyenne</text:span> distance je crois.</text:p>
      <text:p text:style-name="P1">(13) Espérons qu'il y a des choses à faire à Macondo.</text:p>
      <text:p text:style-name="P1">(14)</text:p>
      <text:p text:style-name="P1">(15) J'ai caché cet ingrédient dans mon livre. A quelle page déjà ?</text:p>
      <text:p text:style-name="P1">(16) Quelques majuscules se sont égarées <text:span text:style-name="T30">dans mes correspondances</text:span>.</text:p>
      <text:p text:style-name="P1">(17) Journal cher journal, quel est cet ingrédient ?</text:p>
      <text:p text:style-name="P1">(18) Dans une invitation, trouvez un mot cramoisi.</text:p>
      <text:p text:style-name="P21">(19) Ce n’est <text:span text:style-name="T31">pas</text:span> rapide.</text:p>
      <text:p text:style-name="P22">(20) <text:span text:style-name="T32">Des quatres propositions, je prend celle de Bobby.</text:span></text:p>
      <text:p text:style-name="P23">(21) <text:span text:style-name="T33">Ainsi donc, c’est comme ça que les journaux parlent de moi.</text:span></text:p>
      <text:p text:style-name="P24">XX</text:p>
      <text:p text:style-name="P25">XXXXOXXXXXXXX</text:p>
      <text:p text:style-name="P25">XXXXXXXXX</text:p>
      <text:p text:style-name="P25">X</text:p>
      <text:p text:style-name="P25">XXXXXXX</text:p>
      <text:p text:style-name="P25">XXX</text:p>
      <text:p text:style-name="P25">XX</text:p>
      <text:p text:style-name="P25">XXOXXX</text:p>
      <text:p text:style-name="P25">XX</text:p>
      <text:p text:style-name="P25">XXOXXXXX</text:p>
      <text:p text:style-name="P25">OX</text:p>
      <text:p text:style-name="P25">XXXXXX</text:p>
      <text:p text:style-name="P25">XXX</text:p>
      <text:p text:style-name="P25">XXXXXX</text:p>
      <text:p text:style-name="P25">XXXOXX</text:p>
      <text:p text:style-name="P25">XXX</text:p>
      <text:p text:style-name="P25">XXXXX</text:p>
      <text:p text:style-name="P25">XXXXXXXXO</text:p>
      <text:p text:style-name="P26">Entrée :</text:p>
      <text:p text:style-name="P27"/>
      <text:p text:style-name="P27">Crackers à la gelée de vin rouge, Cottage Cheese Scones, chutney au curry.</text:p>
      <text:p text:style-name="P27"/>
      <text:p text:style-name="P27">---</text:p>
      <text:p text:style-name="P27"/>
      <text:p text:style-name="P27">Plat :</text:p>
      <text:p text:style-name="P27"/>
      <text:p text:style-name="P27">Fish and Chips de poisIsons exotiques préparé par notre chef.</text:p>
      <text:p text:style-name="P27"/>
      <text:p text:style-name="P27">---</text:p>
      <text:p text:style-name="P27"/>
      <text:p text:style-name="P28">Fromages</text:p>
      <text:p text:style-name="P27"/>
      <text:p text:style-name="P27">---</text:p>
      <text:p text:style-name="P27"/>
      <text:p text:style-name="P27">Dessert :</text:p>
      <text:p text:style-name="P27"/>
      <text:p text:style-name="P27">Plum pudding</text:p>
      <text:p text:style-name="P29">Bob,</text:p>
      <text:p text:style-name="P30"/>
      <text:p text:style-name="P30">On va avoir besoin de toi dans les cuisines, parait que le chef M. Gembre a eu une intoxication. C'est ballot ça. Je sais que tu te réjouissais de voir les invités et tout mais je suis naze une casserole à la main. Tu trouveras la poiscaille dans la chambre froide. Fais gaffe lors de la préparation et utilise bien un tablier et les gants. Le chef a failli péter un cable sur <text:span text:style-name="T34">la propreté</text:span> ! Qu'est-ce qui peuvent être remontés ces gens.</text:p>
      <text:p text:style-name="P30"/>
      <text:p text:style-name="P30">Si tu recroises Jean, tu luiT diras de mieux choisir les soirs où il tombe malade.</text:p>
      <text:p text:style-name="P30"/>
      <text:p text:style-name="P30">Arch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miri" svg:font-family="Amiri" style:font-pitch="variable"/>
    <style:font-face style:name="Caladea" svg:font-family="Caladea" style:font-family-generic="roman" style:font-pitch="variable"/>
    <style:font-face style:name="Carlito" svg:font-family="Carlito" style:font-family-generic="swiss" style:font-pitch="variable"/>
    <style:font-face style:name="David Libre" svg:font-family="'David Libre'" style:font-pitch="variable"/>
    <style:font-face style:name="DejaVu Math TeX Gyre" svg:font-family="'DejaVu Math TeX Gyre'" style:font-pitch="variable"/>
    <style:font-face style:name="Lato Semibold" svg:font-family="'Lato Semi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URW Chancery L" svg:font-family="'URW Chancery 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4T20:08:27.017851576</meta:creation-date>
    <dc:date>2026-07-15T21:55:29.061342843</dc:date>
    <meta:editing-duration>PT2H38M20S</meta:editing-duration>
    <meta:editing-cycles>102</meta:editing-cycles>
    <meta:generator>LibreOffice/26.2.4.2$Linux_X86_64 LibreOffice_project/620$Build-2</meta:generator>
    <meta:document-statistic meta:table-count="0" meta:image-count="0" meta:object-count="0" meta:page-count="18" meta:paragraph-count="125" meta:word-count="1645" meta:character-count="9375" meta:non-whitespace-character-count="7829"/>
  </office:meta>
</office:document-meta>
</file>